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fo:language="de" fo:country="DE" style:font-name-asian="Courier New" style:font-size-asian="10pt" style:font-name-complex="Courier New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fo:language="de" fo:country="DE" officeooo:rsid="0011f764" officeooo:paragraph-rsid="0011f764" style:font-name-asian="Courier New" style:font-size-asian="10pt" style:font-name-complex="Courier New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fo:language="de" fo:country="DE" officeooo:rsid="0012b03d" officeooo:paragraph-rsid="0012b03d" style:font-name-asian="Courier New" style:font-size-asian="10pt" style:font-name-complex="Courier New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fo:language="de" fo:country="DE" style:font-size-asian="10pt" style:font-size-complex="10pt"/>
    </style:style>
    <style:style style:name="P5" style:family="paragraph" style:parent-style-name="Standard" style:list-style-name="L1">
      <style:paragraph-properties fo:text-align="start" style:justify-single-word="false" style:text-autospace="none"/>
      <style:text-properties style:font-name="Courier New" fo:font-size="10pt" fo:language="de" fo:country="DE" officeooo:rsid="0011f764" officeooo:paragraph-rsid="0011f764" style:font-name-asian="Courier New" style:font-size-asian="10pt" style:font-name-complex="Courier New" style:font-size-complex="10pt"/>
    </style:style>
    <style:style style:name="P6" style:family="paragraph" style:parent-style-name="Standard">
      <style:text-properties style:font-name="Courier New" fo:font-size="10pt" fo:language="de" fo:country="DE" officeooo:paragraph-rsid="0014c6b4" style:font-size-asian="10pt" style:font-size-complex="10pt"/>
    </style:style>
    <style:style style:name="P7" style:family="paragraph" style:parent-style-name="Standard">
      <style:paragraph-properties fo:margin-left="0.002cm" fo:margin-right="0.002cm" fo:margin-top="0.002cm" fo:margin-bottom="0.002cm" loext:contextual-spacing="false" style:line-height-at-least="0.388cm" fo:text-align="start" style:justify-single-word="false" fo:text-indent="0.002cm" style:auto-text-indent="false" style:writing-mode="lr-tb">
        <style:tab-stops>
          <style:tab-stop style:position="0.499cm"/>
        </style:tab-stops>
      </style:paragraph-properties>
      <style:text-properties style:font-name="Courier New" fo:font-size="10pt" fo:language="de" fo:country="DE" style:font-size-asian="10pt" style:font-size-complex="10pt"/>
    </style:style>
    <style:style style:name="P8" style:family="paragraph" style:parent-style-name="Standard">
      <style:paragraph-properties fo:margin-left="0.002cm" fo:margin-right="0.002cm" fo:margin-top="0.002cm" fo:margin-bottom="0.002cm" loext:contextual-spacing="false" style:line-height-at-least="0.353cm" fo:text-align="start" style:justify-single-word="false" fo:text-indent="0.002cm" style:auto-text-indent="false" style:writing-mode="lr-tb">
        <style:tab-stops>
          <style:tab-stop style:position="0.499cm"/>
        </style:tab-stops>
      </style:paragraph-properties>
      <style:text-properties style:font-name="Courier New" fo:font-size="10pt" fo:language="de" fo:country="DE" style:font-size-asian="10pt" style:font-size-complex="10pt"/>
    </style:style>
    <style:style style:name="P9" style:family="paragraph" style:parent-style-name="Text_20_body">
      <style:paragraph-properties fo:margin-left="0cm" fo:margin-right="0cm" fo:text-align="start" style:justify-single-word="false" fo:text-indent="0cm" style:auto-text-indent="false" style:text-autospace="none" style:writing-mode="lr-tb"/>
      <style:text-properties style:font-name="Courier New" fo:font-size="10pt" fo:language="de" fo:country="DE" style:font-name-asian="Courier New" style:font-size-asian="10pt" style:font-name-complex="Courier New" style:font-size-complex="10pt"/>
    </style:style>
    <style:style style:name="T1" style:family="text">
      <style:text-properties officeooo:rsid="0011f764"/>
    </style:style>
    <style:style style:name="T2" style:family="text">
      <style:text-properties officeooo:rsid="0014c6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An Stadt Kleve</text:p>
      <text:p text:style-name="P1">Kavarinerstr. 20-22</text:p>
      <text:p text:style-name="P1">47533 Kleve</text:p>
      <text:p text:style-name="P1">Deutschland</text:p>
      <text:p text:style-name="P1"/>
      <text:p text:style-name="P1"/>
      <text:p text:style-name="P1"/>
      <text:p text:style-name="P1"/>
      <text:p text:style-name="P1"/>
      <text:p text:style-name="P1"><text:tab/><text:tab/><text:tab/><text:tab/>Lelystad, Niederlande, <text:span text:style-name="T1">11</text:span> März <text:span text:style-name="T1">2017</text:span></text:p>
      <text:p text:style-name="P1"/>
      <text:p text:style-name="P1">Sehr geehrte Herr/Frau,</text:p>
      <text:p text:style-name="P1"/>
      <text:p text:style-name="P1"/>
      <text:p text:style-name="P1">Betrifft : Hauptstraße 25/<text:span text:style-name="T1">27 Straßenreinigung/Niederschlagwasser</text:span></text:p>
      <text:p text:style-name="P1"/>
      <text:p text:style-name="P2">Wir bezahlen jedes Jahr seit 2006 Straßenreinigung Gebühr vor die Hauptstraße und für die Doriethstrasse.</text:p>
      <text:p text:style-name="P2"/>
      <text:p text:style-name="P2">Aber erst jetzt haben wir gehört das wir das nicht müssen zahlen, weil</text:p>
      <text:list xml:id="list4465370076958151723" text:style-name="L1">
        <text:list-item>
          <text:p text:style-name="P5">an die Haupstrasse sind bei uns algemeine Parkplatze und an unsere Grenze wird gar nicht gereinigt</text:p>
        </text:list-item>
        <text:list-item>
          <text:p text:style-name="P5">an die Doriethstrasse wird gar nicht gereinigt.</text:p>
        </text:list-item>
      </text:list>
      <text:p text:style-name="P2"/>
      <text:p text:style-name="P2"><text:s/></text:p>
      <text:p text:style-name="P2">Und über Niederschlagwasser: das wird bei uns auf das Grundstick aufgenommen und geht nicht weiter.</text:p>
      <text:p text:style-name="P2"/>
      <text:p text:style-name="P3">Darum:</text:p>
      <text:p text:style-name="P2">Können Sie was wir zufiel bezahlt haben in 2015 und 2015 zurück überwiesenen und die Berechnung für 2017 anpassen</text:p>
      <text:p text:style-name="P2"/>
      <text:p text:style-name="P1"/>
      <text:p text:style-name="P1"/>
      <text:p text:style-name="P4"/>
      <text:p text:style-name="P7">Mit freundlichen Grüßen,</text:p>
      <text:p text:style-name="P7"/>
      <text:p text:style-name="P7">Herbrand Hofker</text:p>
      <text:p text:style-name="P7">Oudaen 26</text:p>
      <text:p text:style-name="P7">8219 AB Lelystad</text:p>
      <text:p text:style-name="P7">Niederlande</text:p>
      <text:p text:style-name="P8">Herbrand.hofker@gmail.com</text:p>
      <text:p text:style-name="P8">Tel: +31654290955</text:p>
      <text:p text:style-name="P6">Deutsche Bank, Kleve: <text:span text:style-name="T2">DE47324700240090215500 </text:span><text:s/>, Hofker , Lelystad.</text:p>
      <text:p text:style-name="P9"/>
      <text:p text:style-name="P9"/>
      <text:p text:style-name="P9"/>
      <text:p text:style-name="P1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rbrand Hofker</meta:initial-creator>
    <meta:creation-date>2011-02-27T07:15:33.10</meta:creation-date>
    <dc:date>2017-03-11T20:09:09.403000000</dc:date>
    <meta:editing-duration>PT18M46S</meta:editing-duration>
    <meta:editing-cycles>3</meta:editing-cycles>
    <meta:generator>LibreOffice/5.2.5.1$Windows_x86 LibreOffice_project/0312e1a284a7d50ca85a365c316c7abbf20a4d22</meta:generator>
    <meta:document-statistic meta:table-count="0" meta:image-count="0" meta:object-count="0" meta:page-count="1" meta:paragraph-count="24" meta:word-count="131" meta:character-count="907" meta:non-whitespace-character-count="792"/>
  </office:meta>
</office:document-meta>
</file>