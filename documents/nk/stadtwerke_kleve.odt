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uBaUniversRegular" svg:font-family="DeuBaUniversRegular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rsid="000697ba" officeooo:paragraph-rsid="000697ba" style:font-size-asian="14pt" style:font-size-complex="14pt"/>
    </style:style>
    <style:style style:name="P2" style:family="paragraph" style:parent-style-name="Standard">
      <style:text-properties style:font-name="Liberation Serif" fo:font-size="12pt" officeooo:rsid="000697ba" officeooo:paragraph-rsid="000697ba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697ba" officeooo:paragraph-rsid="0006a3b1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6a3b1" officeooo:paragraph-rsid="0006a3b1" style:font-size-asian="12pt" style:font-size-complex="12pt"/>
    </style:style>
    <style:style style:name="T1" style:family="text">
      <style:text-properties fo:font-variant="normal" fo:text-transform="none" fo:color="#666666" style:font-name="DeuBaUniversRegular" fo:font-size="5.55000019073486pt" fo:letter-spacing="normal" fo:font-style="normal" fo:font-weight="normal"/>
    </style:style>
    <style:style style:name="T2" style:family="text">
      <style:text-properties fo:font-variant="normal" fo:text-transform="none" fo:color="#666666" fo:font-size="5.55000019073486pt" fo:letter-spacing="normal" fo:font-style="normal" fo:font-weight="normal"/>
    </style:style>
    <style:style style:name="T3" style:family="text">
      <style:text-properties fo:font-variant="normal" fo:text-transform="none" fo:color="#666666" fo:letter-spacing="normal" fo:font-style="normal" fo:font-weight="normal"/>
    </style:style>
    <style:style style:name="T4" style:family="text">
      <style:text-properties fo:font-variant="normal" fo:text-transform="none" fo:color="#666666" fo:letter-spacing="normal" fo:font-style="normal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a3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Stadtwerke Kleve</text:p>
      <text:p text:style-name="P2">Flutstrasse </text:p>
      <text:p text:style-name="P2">47533 Kleve 36</text:p>
      <text:p text:style-name="P4">Duitsland</text:p>
      <text:p text:style-name="P4"/>
      <text:p text:style-name="P2"/>
      <text:p text:style-name="P2"/>
      <text:p text:style-name="P2"><text:tab/><text:tab/><text:tab/><text:tab/><text:tab/><text:tab/><text:tab/><text:tab/>Kleve , 28.01.2017</text:p>
      <text:p text:style-name="P2"/>
      <text:p text:style-name="P2"/>
      <text:p text:style-name="P3"><text:span text:style-name="T6">Betrifft:</text:span></text:p>
      <text:p text:style-name="P3">Kundennummer 184455-116016/ 47477 /94770</text:p>
      <text:p text:style-name="P2"/>
      <text:p text:style-name="P2"/>
      <text:p text:style-name="P2">Unsere Bankrechnung fuer diese Kundennummers isst:</text:p>
      <text:p text:style-name="P2"/>
      <text:p text:style-name="P2"><text:span text:style-name="T4">DE47324700240090215500</text:span><text:span text:style-name="T5"> </text:span><text:s/></text:p>
      <text:p text:style-name="P2"/>
      <text:p text:style-name="P2">Isst es nicht moglich alles unter eine Kundennummer zu setzen?</text:p>
      <text:p text:style-name="P2"/>
      <text:p text:style-name="P2"/>
      <text:p text:style-name="P2">Mfg</text:p>
      <text:p text:style-name="P2"/>
      <text:p text:style-name="P2">Herbrand und Oksana Hofker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uBaUniversRegular" svg:font-family="DeuBaUniversRegular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4:50:04.689000000</meta:creation-date>
    <dc:date>2017-01-28T19:15:34.128000000</dc:date>
    <meta:editing-duration>PT4H25M30S</meta:editing-duration>
    <meta:editing-cycles>2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12" meta:word-count="37" meta:character-count="291" meta:non-whitespace-character-count="255"/>
  </office:meta>
</office:document-meta>
</file>