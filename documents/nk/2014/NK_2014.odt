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, helvetica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e65b"/>
    </style:style>
    <style:style style:name="P2" style:family="paragraph" style:parent-style-name="Standard">
      <style:text-properties fo:language="de" fo:country="DE" officeooo:rsid="0004b5f0" officeooo:paragraph-rsid="0006d318"/>
    </style:style>
    <style:style style:name="P3" style:family="paragraph" style:parent-style-name="Standard">
      <style:text-properties fo:language="de" fo:country="DE" officeooo:rsid="0004b5f0" officeooo:paragraph-rsid="00084927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de" fo:country="DE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01e65b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de" fo:country="DE" officeooo:paragraph-rsid="000af23f"/>
    </style:style>
    <style:style style:name="P7" style:family="paragraph" style:parent-style-name="Standard">
      <style:text-properties fo:font-variant="normal" fo:text-transform="none" fo:color="#333333" style:font-name="Times New Roman" fo:font-size="12pt" fo:letter-spacing="normal" fo:language="de" fo:country="DE" style:font-size-asian="12pt" style:font-size-complex="12pt"/>
    </style:style>
    <style:style style:name="P8" style:family="paragraph" style:parent-style-name="Standard">
      <style:text-properties fo:font-variant="normal" fo:text-transform="none" fo:color="#333333" style:font-name="Times New Roman" fo:font-size="12pt" fo:letter-spacing="normal" fo:language="de" fo:country="DE" officeooo:paragraph-rsid="000af23f" style:font-size-asian="12pt" style:font-size-complex="12pt"/>
    </style:style>
    <style:style style:name="P9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bold" style:font-size-asian="12pt" style:font-style-asian="normal" style:font-weight-asian="bold" style:font-name-complex="arial" style:font-size-complex="12pt" style:font-weight-complex="bold"/>
    </style:style>
    <style:style style:name="P10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paragraph-rsid="0001e65b" style:font-size-asian="12pt" style:font-style-asian="normal" style:font-weight-asian="normal" style:font-name-complex="arial" style:font-size-complex="12pt" style:font-weight-complex="normal"/>
    </style:style>
    <style:style style:name="P11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officeooo:paragraph-rsid="0006d318" style:font-size-asian="12pt" style:font-style-asian="normal" style:font-weight-asian="normal" style:font-name-complex="arial" style:font-size-complex="12pt" style:font-weight-complex="normal"/>
    </style:style>
    <style:style style:name="P12" style:family="paragraph" style:parent-style-name="Standard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officeooo:paragraph-rsid="00084927" style:font-size-asian="12pt" style:font-style-asian="normal" style:font-weight-asian="normal" style:font-name-complex="arial" style:font-size-complex="12pt" style:font-weight-complex="normal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Times New Roman" fo:language="de" fo:country="DE"/>
    </style:style>
    <style:style style:name="P15" style:family="paragraph" style:parent-style-name="Standard">
      <style:text-properties style:font-name="Times New Roman" fo:language="de" fo:country="DE" officeooo:paragraph-rsid="0001e65b"/>
    </style:style>
    <style:style style:name="P16" style:family="paragraph" style:parent-style-name="Standard">
      <style:text-properties style:font-name="Times New Roman" fo:language="de" fo:country="DE" fo:font-weight="bold" style:font-weight-asian="bold" style:font-weight-complex="bold"/>
    </style:style>
    <style:style style:name="P17" style:family="paragraph" style:parent-style-name="Standard">
      <style:text-properties style:font-name="Times New Roman" fo:language="de" fo:country="DE" fo:font-weight="bold" officeooo:paragraph-rsid="0001e65b" style:font-weight-asian="bold" style:font-weight-complex="bold"/>
    </style:style>
    <style:style style:name="P18" style:family="paragraph" style:parent-style-name="Standard">
      <style:text-properties style:font-name="Times New Roman" fo:language="de" fo:country="DE" fo:font-weight="normal" style:font-weight-asian="normal" style:font-weight-complex="normal"/>
    </style:style>
    <style:style style:name="P19" style:family="paragraph" style:parent-style-name="Standard">
      <style:text-properties style:font-name="Times New Roman" fo:language="de" fo:country="DE" fo:font-weight="normal" officeooo:paragraph-rsid="0001e65b" style:font-weight-asian="normal" style:font-weight-complex="normal"/>
    </style:style>
    <style:style style:name="P20" style:family="paragraph" style:parent-style-name="Standard">
      <style:text-properties style:font-name="Times New Roman" fo:language="de" fo:country="DE" officeooo:rsid="0001e65b" officeooo:paragraph-rsid="0001e65b"/>
    </style:style>
    <style:style style:name="P21" style:family="paragraph" style:parent-style-name="Standard">
      <style:text-properties style:font-name="Times New Roman" fo:language="de" fo:country="DE" officeooo:rsid="0006d318" officeooo:paragraph-rsid="0006d318"/>
    </style:style>
    <style:style style:name="P22" style:family="paragraph" style:parent-style-name="Standard">
      <style:text-properties style:font-name="Times New Roman" officeooo:paragraph-rsid="0001e65b"/>
    </style:style>
    <style:style style:name="P23" style:family="paragraph" style:parent-style-name="Standard"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Times New Roman" fo:font-size="12pt" fo:language="de" fo:country="DE" style:font-size-asian="12pt" style:font-size-complex="12pt"/>
    </style:style>
    <style:style style:name="P25" style:family="paragraph" style:parent-style-name="Standard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2pt" style:font-size-asian="12pt" style:font-size-complex="12pt"/>
    </style:style>
    <style:style style:name="P27" style:family="paragraph" style:parent-style-name="Standard">
      <style:text-properties style:font-name="Times New Roman" fo:font-size="12pt" officeooo:paragraph-rsid="0001e65b" style:font-size-asian="12pt" style:font-size-complex="12pt"/>
    </style:style>
    <style:style style:name="P28" style:family="paragraph" style:parent-style-name="Standard">
      <style:text-properties style:font-name="Times New Roman" officeooo:paragraph-rsid="0006d318"/>
    </style:style>
    <style:style style:name="P29" style:family="paragraph" style:parent-style-name="Standard">
      <style:text-properties style:font-name="Times New Roman" officeooo:paragraph-rsid="00084927"/>
    </style:style>
    <style:style style:name="P30" style:family="paragraph" style:parent-style-name="Standard">
      <style:text-properties officeooo:paragraph-rsid="00084927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Times New Roman" fo:language="de" fo:country="DE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Times New Roman" fo:language="de" fo:country="DE" officeooo:paragraph-rsid="0001e65b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de" fo:country="DE" style:font-size-asian="12pt" style:font-size-complex="12pt"/>
    </style:style>
    <style:style style:name="P34" style:family="paragraph" style:parent-style-name="Standard">
      <style:paragraph-properties fo:break-before="page"/>
      <style:text-properties style:font-name="Times New Roman" fo:language="de" fo:country="DE"/>
    </style:style>
    <style:style style:name="P35" style:family="paragraph" style:parent-style-name="Standard">
      <style:paragraph-properties fo:break-before="page"/>
      <style:text-properties style:font-name="Times New Roman" fo:language="de" fo:country="DE" officeooo:paragraph-rsid="0001e65b"/>
    </style:style>
    <style:style style:name="P36" style:family="paragraph" style:parent-style-name="Standard">
      <style:paragraph-properties fo:break-before="page"/>
      <style:text-properties style:font-name="Times New Roman" fo:language="de" fo:country="DE" fo:font-weight="bold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Times New Roman" fo:language="de" fo:country="DE" officeooo:rsid="0006d318" officeooo:paragraph-rsid="0006d318"/>
    </style:style>
    <style:style style:name="P38" style:family="paragraph" style:parent-style-name="Standard">
      <style:paragraph-properties fo:break-before="page"/>
      <style:text-properties fo:font-variant="normal" fo:text-transform="none" fo:color="#363f51" style:font-name="Times New Roman" fo:font-size="12pt" fo:letter-spacing="normal" fo:language="de" fo:country="DE" fo:font-style="normal" fo:font-weight="normal" officeooo:paragraph-rsid="0001e65b" style:font-size-asian="12pt" style:font-style-asian="normal" style:font-weight-asian="normal" style:font-name-complex="arial" style:font-size-complex="12pt" style:font-weight-complex="normal"/>
    </style:style>
    <style:style style:name="P39" style:family="paragraph" style:parent-style-name="Standard">
      <style:paragraph-properties fo:break-before="page"/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officeooo:paragraph-rsid="00084927" style:font-size-asian="12pt" style:font-style-asian="normal" style:font-weight-asian="normal" style:font-name-complex="arial" style:font-size-complex="12pt" style:font-weight-complex="normal"/>
    </style:style>
    <style:style style:name="P40" style:family="paragraph" style:parent-style-name="Standard">
      <style:paragraph-properties fo:break-before="page"/>
      <style:text-properties fo:font-variant="normal" fo:text-transform="none" fo:color="#363f51" style:font-name="Times New Roman" fo:font-size="12pt" fo:letter-spacing="normal" fo:language="de" fo:country="DE" fo:font-style="normal" fo:font-weight="bold" style:font-size-asian="12pt" style:font-style-asian="normal" style:font-weight-asian="bold" style:font-name-complex="arial" style:font-size-complex="12pt" style:font-weight-complex="bold"/>
    </style:style>
    <style:style style:name="P41" style:family="paragraph" style:parent-style-name="Standard" style:master-page-name="Standard">
      <style:paragraph-properties style:page-number="auto"/>
      <style:text-properties style:font-name="Times New Roman" fo:language="de" fo:country="DE"/>
    </style:style>
    <style:style style:name="P42" style:family="paragraph" style:parent-style-name="Standard">
      <style:text-properties style:font-name="Times New Roman"/>
    </style:style>
    <style:style style:name="P43" style:family="paragraph" style:parent-style-name="Standard" style:list-style-name="WW8Num1">
      <style:text-properties style:font-name="Times New Roman" fo:language="de" fo:country="DE"/>
    </style:style>
    <style:style style:name="P44" style:family="paragraph" style:parent-style-name="Standard" style:list-style-name="WW8Num1">
      <style:text-properties style:font-name="Times New Roman" fo:language="de" fo:country="DE" officeooo:paragraph-rsid="0001e65b"/>
    </style:style>
    <style:style style:name="P45" style:family="paragraph" style:parent-style-name="Standard">
      <style:text-properties style:font-name="Times New Roman" fo:language="de" fo:country="DE" officeooo:paragraph-rsid="00102c98"/>
    </style:style>
    <style:style style:name="P46" style:family="paragraph" style:parent-style-name="Standard">
      <style:text-properties style:font-name="Times New Roman" fo:language="de" fo:country="DE" officeooo:paragraph-rsid="00084927"/>
    </style:style>
    <style:style style:name="P47" style:family="paragraph" style:parent-style-name="Standard" style:list-style-name="WW8Num1">
      <style:text-properties style:font-name="Times New Roman" fo:font-size="12pt" fo:language="de" fo:country="DE" style:font-size-asian="12pt" style:font-size-complex="12pt"/>
    </style:style>
    <style:style style:name="P48" style:family="paragraph" style:parent-style-name="Standard">
      <style:text-properties style:font-name="Times New Roman" officeooo:paragraph-rsid="00102c98"/>
    </style:style>
    <style:style style:name="P49" style:family="paragraph" style:parent-style-name="Standard">
      <style:text-properties style:font-name="Times New Roman" officeooo:rsid="0011bdfa" officeooo:paragraph-rsid="0011bdfa"/>
    </style:style>
    <style:style style:name="P50" style:family="paragraph" style:parent-style-name="Standard">
      <style:text-properties style:font-name="Times New Roman" officeooo:paragraph-rsid="0013c70d"/>
    </style:style>
    <style:style style:name="P51" style:family="paragraph" style:parent-style-name="Standard">
      <style:text-properties fo:font-variant="normal" fo:text-transform="none" fo:color="#333333" style:font-name="Times New Roman" fo:letter-spacing="normal" fo:language="de" fo:country="DE" officeooo:rsid="000af23f" officeooo:paragraph-rsid="000af23f"/>
    </style:style>
    <style:style style:name="P52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4b5f0"/>
    </style:style>
    <style:style style:name="P53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6d318"/>
    </style:style>
    <style:style style:name="P54" style:family="paragraph" style:parent-style-name="Standard">
      <style:text-properties fo:font-variant="normal" fo:text-transform="none" fo:color="#333333" style:font-name="Times New Roman" fo:letter-spacing="normal" fo:language="de" fo:country="DE" officeooo:rsid="0004b5f0" officeooo:paragraph-rsid="00084927"/>
    </style:style>
    <style:style style:name="P55" style:family="paragraph" style:parent-style-name="Standard">
      <style:text-properties fo:font-variant="normal" fo:text-transform="none" fo:color="#333333" style:font-name="Times New Roman" fo:letter-spacing="normal" fo:language="de" fo:country="DE" officeooo:rsid="0006d318" officeooo:paragraph-rsid="0006d318"/>
    </style:style>
    <style:style style:name="P56" style:family="paragraph" style:parent-style-name="Standard">
      <style:text-properties fo:font-variant="normal" fo:text-transform="none" fo:color="#333333" style:font-name="Times New Roman" fo:font-size="12pt" fo:letter-spacing="normal" fo:language="de" fo:country="DE" officeooo:paragraph-rsid="000af23f" style:font-size-asian="12pt" style:font-size-complex="12pt"/>
    </style:style>
    <style:style style:name="P57" style:family="paragraph" style:parent-style-name="Standard">
      <style:text-properties fo:font-variant="normal" fo:text-transform="none" fo:color="#333333" style:font-name="Times New Roman" fo:font-size="12pt" fo:letter-spacing="normal" fo:language="de" fo:country="DE" fo:font-style="normal" fo:font-weight="normal" officeooo:rsid="0004b5f0" officeooo:paragraph-rsid="0006d318" style:font-size-asian="12pt" style:font-style-asian="normal" style:font-weight-asian="normal" style:font-name-complex="arial" style:font-size-complex="12pt" style:font-weight-complex="normal"/>
    </style:style>
    <style:style style:name="P58" style:family="paragraph" style:parent-style-name="Standard">
      <style:text-properties fo:font-variant="normal" fo:text-transform="none" fo:color="#333333" style:font-name="Times New Roman" fo:font-size="12pt" fo:letter-spacing="normal" fo:language="de" fo:country="DE" fo:font-style="normal" fo:font-weight="normal" officeooo:rsid="0004b5f0" officeooo:paragraph-rsid="00084927" style:font-size-asian="12pt" style:font-style-asian="normal" style:font-weight-asian="normal" style:font-name-complex="arial" style:font-size-complex="12pt" style:font-weight-complex="normal"/>
    </style:style>
    <style:style style:name="P59" style:family="paragraph" style:parent-style-name="Standard">
      <style:paragraph-properties fo:break-before="page"/>
      <style:text-properties fo:font-variant="normal" fo:text-transform="none" fo:color="#333333" style:font-name="Times New Roman" fo:letter-spacing="normal" fo:language="de" fo:country="DE" officeooo:rsid="0004b5f0" officeooo:paragraph-rsid="0006d318"/>
    </style:style>
    <style:style style:name="P60" style:family="paragraph" style:parent-style-name="Standard">
      <style:paragraph-properties fo:break-before="page"/>
      <style:text-properties style:font-name="Times New Roman" fo:language="de" fo:country="DE" officeooo:paragraph-rsid="00084927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 style:font-weight-complex="bold"/>
    </style:style>
    <style:style style:name="T3" style:family="text">
      <style:text-properties fo:language="de" fo:country="DE" fo:font-weight="normal" style:font-weight-asian="normal" style:font-weight-complex="normal"/>
    </style:style>
    <style:style style:name="T4" style:family="text">
      <style:text-properties fo:language="de" fo:country="DE" officeooo:rsid="0001e65b"/>
    </style:style>
    <style:style style:name="T5" style:family="text">
      <style:text-properties fo:language="de" fo:country="DE" officeooo:rsid="00102c98"/>
    </style:style>
    <style:style style:name="T6" style:family="text">
      <style:text-properties fo:language="de" fo:country="DE" officeooo:rsid="0011bdfa"/>
    </style:style>
    <style:style style:name="T7" style:family="text">
      <style:text-properties fo:language="de" fo:country="DE" officeooo:rsid="0013c70d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fo:language="de" fo:country="DE"/>
    </style:style>
    <style:style style:name="T10" style:family="text">
      <style:text-properties fo:font-variant="normal" fo:text-transform="none" fo:color="#333333" fo:letter-spacing="normal" fo:language="de" fo:country="DE" officeooo:rsid="0004b5f0"/>
    </style:style>
    <style:style style:name="T11" style:family="text">
      <style:text-properties fo:font-variant="normal" fo:text-transform="none" fo:color="#333333" fo:letter-spacing="normal" fo:language="de" fo:country="DE" officeooo:rsid="00102c98"/>
    </style:style>
    <style:style style:name="T12" style:family="text">
      <style:text-properties fo:font-variant="normal" fo:text-transform="none" fo:color="#333333" fo:letter-spacing="normal" fo:language="de" fo:country="DE" officeooo:rsid="0011bdfa"/>
    </style:style>
    <style:style style:name="T13" style:family="text">
      <style:text-properties fo:font-variant="normal" fo:text-transform="none" fo:color="#333333" fo:letter-spacing="normal" fo:language="de" fo:country="DE" officeooo:rsid="0013c70d"/>
    </style:style>
    <style:style style:name="T14" style:family="text">
      <style:text-properties fo:font-variant="normal" fo:text-transform="none" fo:color="#333333" fo:letter-spacing="normal" officeooo:rsid="0001e65b"/>
    </style:style>
    <style:style style:name="T15" style:family="text">
      <style:text-properties fo:font-variant="normal" fo:text-transform="none" fo:color="#333333" fo:letter-spacing="normal" officeooo:rsid="0004b5f0"/>
    </style:style>
    <style:style style:name="T16" style:family="text">
      <style:text-properties fo:font-variant="normal" fo:text-transform="none" fo:color="#333333" fo:letter-spacing="normal" officeooo:rsid="0006d318"/>
    </style:style>
    <style:style style:name="T17" style:family="text">
      <style:text-properties fo:font-variant="normal" fo:text-transform="none" fo:color="#333333" fo:letter-spacing="normal" officeooo:rsid="0011bdfa"/>
    </style:style>
    <style:style style:name="T18" style:family="text">
      <style:text-properties fo:font-variant="normal" fo:text-transform="none" fo:color="#333333" fo:letter-spacing="normal" officeooo:rsid="0013c70d"/>
    </style:style>
    <style:style style:name="T19" style:family="text">
      <style:text-properties fo:font-variant="normal" fo:text-transform="none" fo:color="#333333" fo:font-size="12pt" fo:letter-spacing="normal" style:font-size-asian="12pt" style:font-size-complex="12pt"/>
    </style:style>
    <style:style style:name="T20" style:family="text">
      <style:text-properties fo:font-variant="normal" fo:text-transform="none" fo:color="#333333" fo:font-size="12pt" fo:letter-spacing="normal" officeooo:rsid="0001e65b" style:font-size-asian="12pt" style:font-size-complex="12pt"/>
    </style:style>
    <style:style style:name="T21" style:family="text">
      <style:text-properties fo:font-variant="normal" fo:text-transform="none" fo:color="#333333" fo:font-size="12pt" fo:letter-spacing="normal" officeooo:rsid="00122405" style:font-size-asian="12pt" style:font-size-complex="12pt"/>
    </style:style>
    <style:style style:name="T22" style:family="text">
      <style:text-properties fo:font-variant="normal" fo:text-transform="none" fo:color="#333333" fo:font-size="12pt" fo:letter-spacing="normal" officeooo:rsid="0012ca2a" style:font-size-asian="12pt" style:font-size-complex="12pt"/>
    </style:style>
    <style:style style:name="T23" style:family="text">
      <style:text-properties fo:font-variant="normal" fo:text-transform="none" fo:color="#333333" fo:font-size="12pt" fo:letter-spacing="normal" fo:language="de" fo:country="DE" style:font-size-asian="12pt" style:font-size-complex="12pt"/>
    </style:style>
    <style:style style:name="T24" style:family="text">
      <style:text-properties fo:font-variant="normal" fo:text-transform="none" fo:color="#333333" fo:font-size="12pt" fo:letter-spacing="normal" fo:language="de" fo:country="DE" officeooo:rsid="00122405" style:font-size-asian="12pt" style:font-size-complex="12pt"/>
    </style:style>
    <style:style style:name="T25" style:family="text">
      <style:text-properties fo:font-variant="normal" fo:text-transform="none" fo:color="#333333" fo:font-size="12pt" fo:letter-spacing="normal" fo:language="de" fo:country="DE" officeooo:rsid="0012ca2a" style:font-size-asian="12pt" style:font-size-complex="12pt"/>
    </style:style>
    <style:style style:name="T26" style:family="text">
      <style:text-properties fo:font-variant="normal" fo:text-transform="none" fo:color="#333333" fo:font-size="12pt" fo:letter-spacing="normal" fo:language="de" fo:country="DE" fo:font-weight="normal" officeooo:rsid="0006d318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333333" fo:font-size="10pt" fo:letter-spacing="normal" fo:font-weight="bold" loext:padding="0cm" loext:border="none"/>
    </style:style>
    <style:style style:name="T28" style:family="text">
      <style:text-properties fo:font-variant="normal" fo:text-transform="none" fo:color="#333333" fo:font-size="10pt" fo:letter-spacing="normal" fo:font-weight="normal" style:font-weight-asian="normal" style:font-weight-complex="normal" loext:padding="0cm" loext:border="none"/>
    </style:style>
    <style:style style:name="T29" style:family="text">
      <style:text-properties fo:font-variant="normal" fo:text-transform="none" fo:color="#333333" style:font-name="Times New Roman" fo:letter-spacing="normal"/>
    </style:style>
    <style:style style:name="T30" style:family="text">
      <style:text-properties fo:font-variant="normal" fo:text-transform="none" fo:color="#333333" style:font-name="Times New Roman" fo:letter-spacing="normal" officeooo:rsid="0006d318"/>
    </style:style>
    <style:style style:name="T31" style:family="text">
      <style:text-properties fo:font-variant="normal" fo:text-transform="none" fo:color="#333333" style:font-name="Times New Roman" fo:letter-spacing="normal" fo:language="de" fo:country="DE" officeooo:rsid="0004b5f0"/>
    </style:style>
    <style:style style:name="T32" style:family="text">
      <style:text-properties fo:font-variant="normal" fo:text-transform="none" fo:color="#333333" style:font-name="Times New Roman" fo:letter-spacing="normal" fo:language="de" fo:country="DE" officeooo:rsid="0006d318"/>
    </style:style>
    <style:style style:name="T33" style:family="text">
      <style:text-properties fo:font-variant="normal" fo:text-transform="none" fo:color="#363f51" style:font-name="Times New Roman" fo:font-size="12pt" fo:letter-spacing="normal" fo:language="de" fo:country="DE" fo:font-style="normal" fo:font-weight="normal" officeooo:rsid="0006d318" style:font-size-asian="12pt" style:font-style-asian="normal" style:font-weight-asian="normal" style:font-name-complex="arial" style:font-size-complex="12pt" style:font-weight-complex="normal"/>
    </style:style>
    <style:style style:name="T34" style:family="text">
      <style:text-properties fo:font-size="12pt" fo:language="de" fo:country="DE" style:font-size-asian="12pt" style:font-size-complex="12pt"/>
    </style:style>
    <style:style style:name="T35" style:family="text">
      <style:text-properties fo:font-size="12pt" fo:language="de" fo:country="DE" officeooo:rsid="0001e65b" style:font-size-asian="12pt" style:font-size-complex="12pt"/>
    </style:style>
    <style:style style:name="T36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37" style:family="text"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T38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39" style:family="text">
      <style:text-properties officeooo:rsid="0001e65b"/>
    </style:style>
    <style:style style:name="T40" style:family="text">
      <style:text-properties style:font-name="Times New Roman" fo:language="de" fo:country="DE"/>
    </style:style>
    <style:style style:name="T41" style:family="text">
      <style:text-properties officeooo:rsid="00064ca9"/>
    </style:style>
    <style:style style:name="T42" style:family="text">
      <style:text-properties officeooo:rsid="000af23f"/>
    </style:style>
    <style:style style:name="T43" style:family="text">
      <style:text-properties officeooo:rsid="000cd8ea"/>
    </style:style>
    <style:style style:name="T44" style:family="text">
      <style:text-properties officeooo:rsid="0012ca2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file:///..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15"><text:tab/></text:p>
      <text:p text:style-name="P15"><text:tab/><text:tab/><text:tab/><text:tab/><text:tab/><text:tab/>Herbrand und Oksana Hofker</text:p>
      <text:p text:style-name="P15"><text:tab/><text:tab/><text:tab/><text:tab/><text:tab/><text:tab/>Hauptstraße 25</text:p>
      <text:p text:style-name="P15"><text:tab/><text:tab/><text:tab/><text:tab/><text:tab/><text:tab/>47533 Kleve Donsbrüggen</text:p>
      <text:p text:style-name="P1"><text:span text:style-name="T40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15"><text:tab/><text:tab/><text:tab/><text:tab/><text:tab/><text:tab/><text:tab/></text:p>
      <text:p text:style-name="P15"/>
      <text:p text:style-name="P15"/>
      <text:p text:style-name="P15"/>
      <text:p text:style-name="P17"><text:span text:style-name="T39">Monika</text:span> <text:span text:style-name="T39">Pullich</text:span></text:p>
      <text:p text:style-name="P17">Hauptstraße 25</text:p>
      <text:p text:style-name="P17">47533 Kleve</text:p>
      <text:p text:style-name="P15"/>
      <text:p text:style-name="P15"/>
      <text:p text:style-name="P15"><text:tab/><text:tab/><text:tab/><text:tab/><text:tab/><text:tab/><text:tab/><text:tab/><text:tab/>Kleve-Donsbrüggen, 3<text:span text:style-name="T39">0</text:span>-12-<text:span text:style-name="T39">2015</text:span></text:p>
      <text:p text:style-name="P15"/>
      <text:p text:style-name="P19">Sehr geehrte <text:s/><text:span text:style-name="T39">Frau Pullich,</text:span></text:p>
      <text:p text:style-name="P15"/>
      <text:p text:style-name="P15">Hier isst die Abrechnung 201<text:span text:style-name="T39">4.</text:span></text:p>
      <text:list xml:id="list8915315611364521607" text:style-name="WW8Num1">
        <text:list-item>
          <text:p text:style-name="P44">Heizkosten Abrechnung von Brunata</text:p>
        </text:list-item>
        <text:list-item>
          <text:p text:style-name="P44">Nebenkosten Abrechnung.</text:p>
        </text:list-item>
      </text:list>
      <text:p text:style-name="P32"/>
      <text:p text:style-name="P50"><text:span text:style-name="T1">Nachzahlung fuer Heizung <text:s/><text:tab/><text:tab/></text:span><text:span text:style-name="T8">€ <text:s/></text:span><text:span text:style-name="T14">214,25 Guthaben</text:span><text:span text:style-name="T1"> </text:span></text:p>
      <text:p text:style-name="P50"><text:span text:style-name="T1">Nachzahlung fuer </text:span><text:span text:style-name="T7">Nebenkosten</text:span><text:span text:style-name="T1"><text:tab/></text:span><text:span text:style-name="T8">€ <text:s text:c="2"/></text:span><text:span text:style-name="T18">58</text:span><text:span text:style-name="T14">,</text:span><text:span text:style-name="T18">77</text:span><text:span text:style-name="T14"> </text:span></text:p>
      <text:p text:style-name="P50"><text:span text:style-name="T1">Zusammen </text:span><text:span text:style-name="T7">Guthaben</text:span><text:span text:style-name="T1"> <text:tab/> <text:s text:c="22"/></text:span><text:span text:style-name="T8">€ </text:span><text:span text:style-name="T9"><text:s/></text:span><text:span text:style-name="T13">155</text:span><text:span text:style-name="T9">,</text:span><text:span text:style-name="T13">4</text:span><text:span text:style-name="T9">8</text:span></text:p>
      <text:p text:style-name="P22"/>
      <text:p text:style-name="P6">Bitte bezahlen Sie vor 15 Januar 201<text:span text:style-name="T41">6,</text:span></text:p>
      <text:p text:style-name="P51">( wenn Gutachten dann bezahlen wir Sie gleich, wenn Sie uns ihre Konto emailen.)</text:p>
      <text:p text:style-name="P8"/>
      <text:p text:style-name="P5">Die Unterlagen von die Berechnung können <text:s/>Sie einsehen bei Steuerberater/Anwalt Herr Liwerski, Lindenallee 23 , Kleve.</text:p>
      <text:p text:style-name="P5"/>
      <text:p text:style-name="P52"/>
      <text:p text:style-name="P15"/>
      <text:p text:style-name="P15">Mit freundliche Grüßen,</text:p>
      <text:p text:style-name="P15"/>
      <text:p text:style-name="P15"/>
      <text:p text:style-name="P15">Herbrand und Oksana Hofker</text:p>
      <text:p text:style-name="P17"/>
      <text:p text:style-name="P10">Unseres Konto bei die Deutsche Bank</text:p>
      <text:p text:style-name="P10">DE47324700240090215500</text:p>
      <text:p text:style-name="P38"/>
      <text:p text:style-name="P55">Liebe Mieter,</text:p>
      <text:p text:style-name="P55"/>
      <text:p text:style-name="P53">Wir wollen probieren in 2016 die Nebenkosten zu reduzieren.</text:p>
      <text:p text:style-name="P28"><text:span text:style-name="T10">Die Heizungs- Abrechnung von Brunata kost viel zu viel, und wir wollen das </text:span><text:span text:style-name="T28">ändern</text:span><text:span text:style-name="T27"> </text:span></text:p>
      <text:p text:style-name="P2"><text:span text:style-name="T29"><text:s/>in <text:s/>die Internet Firma </text:span><text:a xlink:type="simple" xlink:href="http://www.eddi24.de/" text:style-name="Internet_20_link" text:visited-style-name="Visited_20_Internet_20_Link">www.eddi24.de</text:a><text:span text:style-name="T29"> die viel schneller isst und viel weniger kostet </text:span><text:span text:style-name="T30">und es, meinen wir auch besser macht anno 2016.</text:span></text:p>
      <text:p text:style-name="P53">Wir wollen darum ihnen fragen um1.1.2016, oder spätestens <text:s/>7.1.2016 die Heizkörper Messungen selbst zu machen, und uns zu mailen.</text:p>
      <text:p text:style-name="P53">Hierunter haben wir das Nummer von die Messapparaten die bei Ihnen installiert sind.</text:p>
      <text:p text:style-name="P28"><text:span text:style-name="T10">Wenn Sie es nicht vor 7.1.2016 machen kann es das Brunata/Metrona doch kommen </text:span><text:span text:style-name="T26">muss</text:span><text:span text:style-name="T27"> </text:span></text:p>
      <text:p text:style-name="P53"><text:s/>mit unnötige Kosten.</text:p>
      <text:p text:style-name="P57"/>
      <text:p text:style-name="P11">Die Messaparaten haben allen ein Nummer 31555XXX.</text:p>
      <text:p text:style-name="P11">Bitte Email uns Ihre Messungen. (herbrand.hofker@gmail.com)</text:p>
      <text:p text:style-name="P11"/>
      <text:p text:style-name="P11"/>
      <text:p text:style-name="P11"/>
      <text:p text:style-name="P11"/>
      <text:p text:style-name="P11"><draw:frame draw:style-name="fr1" draw:name="Object1" text:anchor-type="paragraph" svg:width="15.759cm" svg:height="1.9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5"><text:tab/><text:tab/><text:tab/><text:tab/><text:tab/><text:tab/>Herbrand und Oksana Hofker</text:p>
      <text:p text:style-name="P14"><text:tab/><text:tab/><text:tab/><text:tab/><text:tab/><text:tab/>Hauptstraße 25</text:p>
      <text:p text:style-name="P14"><text:tab/><text:tab/><text:tab/><text:tab/><text:tab/><text:tab/>47533 Kleve Donsbrüggen</text:p>
      <text:p text:style-name="Standard"><text:span text:style-name="T40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14"><text:tab/><text:tab/><text:tab/><text:tab/><text:tab/><text:tab/><text:tab/></text:p>
      <text:p text:style-name="P14"/>
      <text:p text:style-name="P14"/>
      <text:p text:style-name="P14"/>
      <text:p text:style-name="P16">Herr Andreas und Marion Hasselmann</text:p>
      <text:p text:style-name="P16">Hauptstraße 25</text:p>
      <text:p text:style-name="P16">47533 Kleve</text:p>
      <text:p text:style-name="P14"/>
      <text:p text:style-name="P14"/>
      <text:p text:style-name="P14"><text:tab/><text:tab/><text:tab/><text:tab/><text:tab/><text:tab/><text:tab/><text:tab/><text:tab/>Kleve-Donsbrüggen, 31-12-201<text:span text:style-name="T42">5</text:span></text:p>
      <text:p text:style-name="P14"/>
      <text:p text:style-name="P18">Sehr geehrte <text:s/>Fam. Hasselmann,</text:p>
      <text:p text:style-name="P14"/>
      <text:p text:style-name="P14">Hier isst die Abrechnung 201<text:span text:style-name="T42">4.</text:span></text:p>
      <text:list xml:id="list111350293919214" text:continue-numbering="true" text:style-name="WW8Num1">
        <text:list-item>
          <text:p text:style-name="P43">Heizkosten Abrechnung von Brunata</text:p>
        </text:list-item>
        <text:list-item>
          <text:p text:style-name="P43">Nebenkosten Abrechnung von QuickImmobilie</text:p>
        </text:list-item>
      </text:list>
      <text:p text:style-name="P31"/>
      <text:p text:style-name="P22"><text:span text:style-name="T1">Nachzahlung fuer Heizung <text:s/></text:span><text:span text:style-name="T4">2013</text:span><text:span text:style-name="T1"><text:tab/><text:tab/></text:span><text:span text:style-name="T8">€ <text:s/>390,22</text:span><text:span text:style-name="T1"> </text:span></text:p>
      <text:p text:style-name="P22"><text:span text:style-name="T1">Nachzahlung fuer Nebenkosten <text:s/></text:span><text:span text:style-name="T4">2013</text:span><text:span text:style-name="T1"> <text:s text:c="6"/><text:tab/></text:span><text:span text:style-name="T9">€ <text:s text:c="2"/></text:span><text:span text:style-name="T1">68,65</text:span></text:p>
      <text:p text:style-name="P22"><text:span text:style-name="T1">Nachzahlung fuer Heizung <text:s/></text:span><text:span text:style-name="T4">2014</text:span><text:span text:style-name="T1"><text:tab/><text:tab/></text:span><text:span text:style-name="T8">€ <text:s/></text:span><text:span text:style-name="T14">701</text:span><text:span text:style-name="T8">,</text:span><text:span text:style-name="T14">52</text:span><text:span text:style-name="T1"> </text:span></text:p>
      <text:p text:style-name="P48"><text:span text:style-name="T1">Nachzahlung fuer Nebenkosten <text:s/></text:span><text:span text:style-name="T4">2014</text:span><text:span text:style-name="T1"> <text:s text:c="3"/></text:span><text:span text:style-name="T5">(1)</text:span><text:span text:style-name="T1"> <text:tab/></text:span><text:span text:style-name="T9">€ <text:s text:c="2"/></text:span><text:span text:style-name="T11">36</text:span><text:span text:style-name="T1">,</text:span><text:span text:style-name="T5">47 Guthaben</text:span></text:p>
      <text:p text:style-name="P48"><text:span text:style-name="T1">Nachzahlung fuer Nebenkosten <text:s/></text:span><text:span text:style-name="T4">2014</text:span><text:span text:style-name="T1"> <text:s text:c="3"/></text:span><text:span text:style-name="T5">(2)</text:span><text:span text:style-name="T1"> <text:tab/></text:span><text:span text:style-name="T9">€ <text:s/></text:span><text:span text:style-name="T11">137</text:span><text:span text:style-name="T1">,</text:span><text:span text:style-name="T5">07 Guthaben</text:span></text:p>
      <text:p text:style-name="P45"><text:span text:style-name="T5"/></text:p>
      <text:p text:style-name="P13"><text:span text:style-name="T9"/></text:p>
      <text:p text:style-name="P6">Bitte bezahlen Sie vor 15 Januar 201<text:span text:style-name="T41">6,</text:span></text:p>
      <text:p text:style-name="P51">( wenn Gutachten dann bezahlen wir Sie gleich, wenn Sie uns ihre Konto emailen.)</text:p>
      <text:p text:style-name="P8"/>
      <text:p text:style-name="P13"/>
      <text:p text:style-name="P4">Die Unterlagen von die Berechnung können <text:s/>Sie einsehen bei Steuerberater/Anwalt Herr Liwerski, Lindenallee 23 , Kleve.</text:p>
      <text:p text:style-name="P14"/>
      <text:p text:style-name="P14"/>
      <text:p text:style-name="P14"/>
      <text:p text:style-name="P14">Mit freundliche Grüßen,</text:p>
      <text:p text:style-name="P14"/>
      <text:p text:style-name="P14"/>
      <text:p text:style-name="P14"/>
      <text:p text:style-name="P14">Herbrand und Oksana Hofker</text:p>
      <text:p text:style-name="P14"/>
      <text:p text:style-name="P9">Unseres Konto bei die Deutsche Bank</text:p>
      <text:p text:style-name="P9">DE47324700240090215500</text:p>
      <text:p text:style-name="P14"/>
      <text:p text:style-name="P20"/>
      <text:p text:style-name="P37"><text:span text:style-name="T15">L</text:span><text:span text:style-name="T8">iebe Mieter,</text:span></text:p>
      <text:p text:style-name="P53"/>
      <text:p text:style-name="P53">Wir wollen probieren in 2016 die Nebenkosten zu reduzieren.</text:p>
      <text:p text:style-name="P28"><text:span text:style-name="T10">Die Heizungs- Abrechnung von Brunata kost viel zu viel, und wir wollen das </text:span><text:span text:style-name="T28">ändern</text:span><text:span text:style-name="T27"> </text:span></text:p>
      <text:p text:style-name="P2"><text:span text:style-name="T29"><text:s/>in <text:s/>die Internet Firma </text:span><text:a xlink:type="simple" xlink:href="http://www.eddi24.de/" text:style-name="Internet_20_link" text:visited-style-name="Visited_20_Internet_20_Link">www.eddi24.de</text:a><text:span text:style-name="T29"> die viel schneller isst und viel weniger kostet </text:span><text:span text:style-name="T30">und es, meinen wir auch besser macht anno 2016.</text:span></text:p>
      <text:p text:style-name="P53">Wir wollen darum ihnen fragen um1.1.2016, oder spätestens <text:s/>7.1.2016 die Heizkörper Messungen selbst zu machen, und uns zu mailen.</text:p>
      <text:p text:style-name="P53">Hierunter haben wir das Nummer von die Messapparaten die bei Ihnen installiert sind.</text:p>
      <text:p text:style-name="P28"><text:span text:style-name="T10">Wenn Sie es nicht vor 7.1.2016 machen kann es das Brunata/Metrona doch kommen </text:span><text:span text:style-name="T26">muss</text:span><text:span text:style-name="T27"> </text:span></text:p>
      <text:p text:style-name="P53"><text:s/>mit unnötige Kosten.</text:p>
      <text:p text:style-name="P57"/>
      <text:p text:style-name="P11">Die Messaparaten haben allen ein Nummer 31555XXX.</text:p>
      <text:p text:style-name="P11">Bitte Email uns Ihre Messungen. (herbrand.hofker@gmail.com)</text:p>
      <text:p text:style-name="P11"/>
      <text:p text:style-name="P11">(Und auch bei Ihre Tochter , die stehen nicht hier dabei)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Object2" text:anchor-type="paragraph" svg:width="15.759cm" svg:height="5.89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1"/>
      <text:p text:style-name="P35"/>
      <text:p text:style-name="P14"/>
      <text:p text:style-name="P14"><text:tab/><text:tab/><text:tab/><text:tab/><text:tab/><text:tab/>Herbrand und Oksana Hofker</text:p>
      <text:p text:style-name="P14"><text:tab/><text:tab/><text:tab/><text:tab/><text:tab/><text:tab/>Hauptstraße 25</text:p>
      <text:p text:style-name="P14"><text:tab/><text:tab/><text:tab/><text:tab/><text:tab/><text:tab/>47533 Kleve Donsbrüggen</text:p>
      <text:p text:style-name="Standard"><text:span text:style-name="T40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14"><text:tab/><text:tab/><text:tab/><text:tab/><text:tab/><text:tab/><text:tab/></text:p>
      <text:p text:style-name="P14"/>
      <text:p text:style-name="P14"/>
      <text:p text:style-name="P14"/>
      <text:p text:style-name="P16">Herr Sebastian Hennig</text:p>
      <text:p text:style-name="P16">Hauptstraße 25</text:p>
      <text:p text:style-name="P16">47533 Kleve</text:p>
      <text:p text:style-name="P14"/>
      <text:p text:style-name="P14"/>
      <text:p text:style-name="P14"><text:tab/><text:tab/><text:tab/><text:tab/><text:tab/><text:tab/><text:tab/><text:tab/><text:tab/>Kleve-Donsbrüggen, <text:span text:style-name="T42">31</text:span>-12-201<text:span text:style-name="T42">5</text:span></text:p>
      <text:p text:style-name="P14"/>
      <text:p text:style-name="P14"/>
      <text:p text:style-name="P14"/>
      <text:p text:style-name="P13"><text:span text:style-name="T3">Sehr geehrte <text:s/>Herr </text:span><text:span text:style-name="T37">Hennig</text:span><text:span text:style-name="T3">,</text:span></text:p>
      <text:p text:style-name="P14"/>
      <text:p text:style-name="P14"/>
      <text:p text:style-name="P14">Hier isst die Abrechnung <text:span text:style-name="T42">2014</text:span>.</text:p>
      <text:p text:style-name="P14"/>
      <text:p text:style-name="P14"/>
      <text:list xml:id="list111350374423933" text:continue-numbering="true" text:style-name="WW8Num1">
        <text:list-item>
          <text:p text:style-name="P43">Heizkosten Abrechnung von Brunata</text:p>
        </text:list-item>
        <text:list-item>
          <text:p text:style-name="P43">Nebenkosten Abrechnung von QuickImmobilie</text:p>
        </text:list-item>
      </text:list>
      <text:p text:style-name="P31"/>
      <text:p text:style-name="P13"><text:span text:style-name="T1">Nachzahlung fuer Heizung <text:s/><text:tab/><text:tab/></text:span><text:span text:style-name="T8">€ <text:s/></text:span><text:span text:style-name="T14">93,59 </text:span><text:span text:style-name="T1"><text:s/></text:span></text:p>
      <text:p text:style-name="P13"><text:span text:style-name="T1">Nachzahlung fuer Nebenkosten <text:s text:c="7"/></text:span><text:span text:style-name="T8">€ <text:s/></text:span><text:span text:style-name="T17">72,44</text:span><text:span text:style-name="T1"> </text:span></text:p>
      <text:p text:style-name="P13"/>
      <text:p text:style-name="P13"><text:span text:style-name="T1">Zusammen </text:span><text:span text:style-name="T6">N</text:span><text:span text:style-name="T1">ach</text:span><text:span text:style-name="T6">z</text:span><text:span text:style-name="T1">ahlung <text:tab/> <text:s text:c="11"/></text:span><text:span text:style-name="T8">€</text:span><text:span text:style-name="T9"> </text:span><text:span text:style-name="T12">166</text:span><text:span text:style-name="T9">,</text:span><text:span text:style-name="T12">03</text:span></text:p>
      <text:p text:style-name="P13"/>
      <text:p text:style-name="P49">Sie brauchen nicht zu zahlen , wir hoffen naechste Abrechnung auf ein Guthaben,</text:p>
      <text:p text:style-name="P8"/>
      <text:p text:style-name="P4">Die Unterlagen von die Berechnung können <text:s/>Sie einsehen bei Steuerberater/Anwalt Herr Liwerski, Lindenallee 23 , Kleve.</text:p>
      <text:p text:style-name="P14"/>
      <text:p text:style-name="P14"/>
      <text:p text:style-name="P14">Mit freundliche Grüßen,</text:p>
      <text:p text:style-name="P14"/>
      <text:p text:style-name="P14">Herbrand und Oksana Hofker</text:p>
      <text:p text:style-name="P14"/>
      <text:p text:style-name="P9">Unseres Konto bei die Deutsche Bank</text:p>
      <text:p text:style-name="P9">DE47324700240090215500</text:p>
      <text:p text:style-name="P14"/>
      <text:p text:style-name="P14"/>
      <text:p text:style-name="P59"/>
      <text:p text:style-name="P53"/>
      <text:p text:style-name="P21"><text:span text:style-name="T15">L</text:span><text:span text:style-name="T8">iebe Mieter,</text:span></text:p>
      <text:p text:style-name="P53"/>
      <text:p text:style-name="P53">Wir wollen probieren in 2016 die Nebenkosten zu reduzieren.</text:p>
      <text:p text:style-name="P28"><text:span text:style-name="T10">Die Heizungs- Abrechnung von Brunata kost viel zu viel, und wir wollen das </text:span><text:span text:style-name="T28">ändern</text:span><text:span text:style-name="T27"> </text:span></text:p>
      <text:p text:style-name="P2"><text:span text:style-name="T29"><text:s/>in <text:s/>die Internet Firma </text:span><text:a xlink:type="simple" xlink:href="http://www.eddi24.de/" text:style-name="Internet_20_link" text:visited-style-name="Visited_20_Internet_20_Link">www.eddi24.de</text:a><text:span text:style-name="T29"> die viel schneller isst und viel weniger kostet </text:span><text:span text:style-name="T30">und es ,meinen wir auch besser macht anno 2016.</text:span></text:p>
      <text:p text:style-name="P53">Wir wollen darum ihnen fragen um1.1.2016, oder spätestens <text:s/>7.1.2016 die Heizkörper Messungen selbst zu machen, und uns zu mailen.</text:p>
      <text:p text:style-name="P53">Hierunter haben wir das Nummer von die Messapparaten die bei Ihnen installiert sind.</text:p>
      <text:p text:style-name="P28"><text:span text:style-name="T10">Wenn Sie es nicht vor 7.1.2016 machen kann es das Brunata/Metrona doch kommen </text:span><text:span text:style-name="T26">muss</text:span><text:span text:style-name="T27"> </text:span></text:p>
      <text:p text:style-name="P53"><text:s/>mit unnötige Kosten.</text:p>
      <text:p text:style-name="P57"/>
      <text:p text:style-name="P11">Die Messaparaten haben allen ein Nummer 31555XXX.</text:p>
      <text:p text:style-name="P11">Bitte Email uns Ihre Messungen. (herbrand.hofker@gmail.com)</text:p>
      <text:p text:style-name="P11"/>
      <text:p text:style-name="P11"/>
      <text:p text:style-name="P14"><draw:frame draw:style-name="fr1" draw:name="Object3" text:anchor-type="paragraph" svg:width="15.759cm" svg:height="3.926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4"/>
      <text:p text:style-name="P14"/>
      <text:p text:style-name="P14"/>
      <text:p text:style-name="P13"><text:span text:style-name="T2">Herr Mario M</text:span><text:span text:style-name="T38">ü</text:span><text:span text:style-name="T2">ller</text:span></text:p>
      <text:p text:style-name="P16">Hauptstraße 27</text:p>
      <text:p text:style-name="P16">47533 Kleve</text:p>
      <text:p text:style-name="P14"/>
      <text:p text:style-name="P14"/>
      <text:p text:style-name="P14"/>
      <text:p text:style-name="P14"><text:tab/><text:tab/><text:tab/><text:tab/><text:tab/><text:tab/><text:tab/><text:tab/><text:tab/>Kleve-Donsbrüggen, <text:span text:style-name="T39">30</text:span>-12-201<text:span text:style-name="T39">5</text:span></text:p>
      <text:p text:style-name="P14"/>
      <text:p text:style-name="P14"/>
      <text:p text:style-name="P23"/>
      <text:p text:style-name="P23"/>
      <text:p text:style-name="P24"/>
      <text:p text:style-name="P24"/>
      <text:p text:style-name="P24"/>
      <text:p text:style-name="P13"><text:span text:style-name="T36">Sehr geehrte <text:s/>Herr M</text:span><text:span text:style-name="T37">üller</text:span><text:span text:style-name="T36">,</text:span></text:p>
      <text:p text:style-name="P24"/>
      <text:p text:style-name="P24"/>
      <text:p text:style-name="P24">Hier isst die Abrechnung Heizung un<text:span text:style-name="T39">d</text:span> Nebenkosten <text:span text:style-name="T39">2014</text:span>.</text:p>
      <text:p text:style-name="P24"/>
      <text:p text:style-name="P24"/>
      <text:list xml:id="list111348894363005" text:continue-numbering="true" text:style-name="WW8Num1">
        <text:list-item>
          <text:p text:style-name="P47">Heizkosten Abrechnung von Brunata</text:p>
        </text:list-item>
        <text:list-item>
          <text:p text:style-name="P47">Nebenkosten Abrechnung <text:span text:style-name="T44">(sehe Mietvertrag)</text:span></text:p>
        </text:list-item>
      </text:list>
      <text:p text:style-name="P33"/>
      <text:p text:style-name="P13"><text:span text:style-name="T34">Nachzahlung fuer Heizung <text:s/><text:tab/><text:tab/></text:span><text:span text:style-name="T19">€ <text:s text:c="2"/></text:span><text:span text:style-name="T20">283,57</text:span><text:span text:style-name="T34"> </text:span></text:p>
      <text:p text:style-name="P13"><text:span text:style-name="T34">Nachzahlung fuer Nebenkosten <text:s text:c="8"/></text:span><text:span text:style-name="T19">€ <text:s text:c="2"/></text:span><text:span text:style-name="T22">338</text:span><text:span text:style-name="T19">,</text:span><text:span text:style-name="T22">89</text:span></text:p>
      <text:p text:style-name="P26"/>
      <text:p text:style-name="P13"><text:span text:style-name="T34">Zusammen <text:s/>macht das <text:s text:c="6"/></text:span><text:span text:style-name="T19">€</text:span><text:span text:style-name="T23"> <text:s/></text:span><text:span text:style-name="T25">622</text:span><text:span text:style-name="T23">,</text:span><text:span text:style-name="T25">46</text:span><text:span text:style-name="T23"> zu bezahlen.</text:span></text:p>
      <text:p text:style-name="P26"/>
      <text:p text:style-name="P6">Bitte bezahlen Sie vor 15 Januar 201<text:span text:style-name="T41">6,</text:span></text:p>
      <text:p text:style-name="P8"/>
      <text:p text:style-name="P7">Die Unterlagen von die Berechnung können <text:s/>Sie einsehen bei Steuerberater/Anwalt Herr Liwerski, Lindenallee 23 , Kleve.</text:p>
      <text:p text:style-name="P26"/>
      <text:p text:style-name="P24">Mit freundliche Grüßen,</text:p>
      <text:p text:style-name="P24"/>
      <text:p text:style-name="P24"/>
      <text:p text:style-name="P24"/>
      <text:p text:style-name="P24">Herbrand und Oksana Hofker</text:p>
      <text:p text:style-name="Standard"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14"/>
      <text:p text:style-name="P9">Unseres Konto bei die Deutsche Bank</text:p>
      <text:p text:style-name="P9">DE47324700240090215500</text:p>
      <text:p text:style-name="P14"/>
      <text:p text:style-name="P14"><text:tab/><text:tab/><text:tab/><text:tab/><text:tab/><text:tab/>Herbrand und Oksana Hofker</text:p>
      <text:p text:style-name="P14"><text:tab/><text:tab/><text:tab/><text:tab/><text:tab/><text:tab/>Hauptstraße 25</text:p>
      <text:p text:style-name="P14"><text:tab/><text:tab/><text:tab/><text:tab/><text:tab/><text:tab/>47533 Kleve Donsbrüggen</text:p>
      <text:p text:style-name="Standard"><text:span text:style-name="T40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14"><text:tab/><text:tab/><text:tab/><text:tab/><text:tab/><text:tab/><text:tab/></text:p>
      <text:p text:style-name="P46"><text:span text:style-name="T15"/></text:p>
      <text:p text:style-name="P60"><text:span text:style-name="T15">L</text:span><text:span text:style-name="T16">iebe Mieter,</text:span></text:p>
      <text:p text:style-name="P54"/>
      <text:p text:style-name="P54">Wir wollen probieren in 2016 die Nebenkosten zu reduzieren.</text:p>
      <text:p text:style-name="P29"><text:span text:style-name="T10">Die Heizungs- Abrechnung von Brunata kost viel zu viel, und wir wollen das </text:span><text:span text:style-name="T28">ändern</text:span><text:span text:style-name="T27"> </text:span></text:p>
      <text:p text:style-name="P3"><text:span text:style-name="T29"><text:s/>in <text:s/>die Internet Firma </text:span><text:a xlink:type="simple" xlink:href="http://www.eddi24.de/" text:style-name="Internet_20_link" text:visited-style-name="Visited_20_Internet_20_Link">www.eddi24.de</text:a><text:span text:style-name="T29"> die viel schneller isst und viel weniger kostet </text:span><text:span text:style-name="T30">und es, meinen wir auch besser macht anno 2016.</text:span></text:p>
      <text:p text:style-name="P54">Wir wollen darum ihnen fragen um1.1.2016, oder spätestens <text:s/>7.1.2016 die Heizkörper Messungen selbst zu machen, und uns zu mailen.</text:p>
      <text:p text:style-name="P54">Hierunter haben wir das Nummer von die Messapparaten die bei Ihnen installiert sind.</text:p>
      <text:p text:style-name="P29"><text:span text:style-name="T10">Wenn Sie es nicht vor 7.1.2016 machen kann es das Brunata/Metrona doch kommen </text:span><text:span text:style-name="T26">muss</text:span><text:span text:style-name="T27"> </text:span></text:p>
      <text:p text:style-name="P54"><text:s/>mit unnötige Kosten.</text:p>
      <text:p text:style-name="P58"/>
      <text:p text:style-name="P12">Die Messaparaten haben allen ein Nummer 31555XXX.</text:p>
      <text:p text:style-name="P12">Bitte Email uns Ihre Messungen. (herbrand.hofker@gmail.com)</text:p>
      <text:p text:style-name="P12"/>
      <text:p text:style-name="P12"/>
      <text:p text:style-name="P12"><draw:frame draw:style-name="fr1" draw:name="Object4" text:anchor-type="paragraph" svg:width="15.759cm" svg:height="5.23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6">Frau Caroline Uhl</text:p>
      <text:p text:style-name="P16">Hauptstraße 27</text:p>
      <text:p text:style-name="P16">47533 Kleve</text:p>
      <text:p text:style-name="P14"/>
      <text:p text:style-name="P14"/>
      <text:p text:style-name="P14"/>
      <text:p text:style-name="P14"><text:tab/><text:tab/><text:tab/><text:tab/><text:tab/><text:tab/><text:tab/><text:tab/><text:tab/>Kleve-Donsbrüggen, <text:span text:style-name="T43">31</text:span>-12-<text:span text:style-name="T43">2015</text:span></text:p>
      <text:p text:style-name="P14"/>
      <text:p text:style-name="P23"/>
      <text:p text:style-name="P23"/>
      <text:p text:style-name="P25">Sehr geehrte <text:s/>Frau Uhl,</text:p>
      <text:p text:style-name="P24"/>
      <text:p text:style-name="P24"/>
      <text:p text:style-name="P24">Hier isst die Abrechnung Heizung un<text:span text:style-name="T42">d</text:span> Nebenkosten <text:span text:style-name="T42">2014</text:span>.</text:p>
      <text:p text:style-name="P24"/>
      <text:p text:style-name="P24"/>
      <text:list xml:id="list111349451118909" text:continue-numbering="true" text:style-name="WW8Num1">
        <text:list-item>
          <text:p text:style-name="P47">Heizkosten Abrechnung von Brunata</text:p>
        </text:list-item>
        <text:list-item>
          <text:p text:style-name="P47">Nebenkosten Abrechnung von QuickImmobilie</text:p>
        </text:list-item>
      </text:list>
      <text:p text:style-name="P33"/>
      <text:p text:style-name="P22"><text:span text:style-name="T34">Nachzahlung fuer Heizung </text:span><text:span text:style-name="T35">2014</text:span><text:span text:style-name="T34"> <text:s/><text:tab/></text:span><text:span text:style-name="T19">€ <text:s text:c="3"/></text:span><text:span text:style-name="T20">126</text:span><text:span text:style-name="T19">,</text:span><text:span text:style-name="T20">77 guthaben</text:span><text:span text:style-name="T34"> </text:span></text:p>
      <text:p text:style-name="P22"><text:span text:style-name="T34">Nachzahlung fuer Nebenkosten <text:s text:c="7"/></text:span><text:span text:style-name="T19">€ <text:s text:c="8"/></text:span><text:span text:style-name="T21">7</text:span><text:span text:style-name="T19">,</text:span><text:span text:style-name="T21">81 guthaben</text:span></text:p>
      <text:p text:style-name="P26"/>
      <text:p text:style-name="P13"><text:span text:style-name="T34">Zusammen <text:s/>macht das <text:s text:c="8"/></text:span><text:span text:style-name="T19">€</text:span><text:span text:style-name="T23"> <text:s/></text:span><text:span text:style-name="T24">133</text:span><text:span text:style-name="T23">,</text:span><text:span text:style-name="T24">58</text:span><text:span text:style-name="T23"> <text:s/></text:span><text:span text:style-name="T24">Guthaben. Wir haben keine Konto von dich, bitte emaile dann konnen wir das ueberweisen.</text:span></text:p>
      <text:p text:style-name="P26"/>
      <text:p text:style-name="P6">Bitte bezahlen Sie vor 15 Januar 201<text:span text:style-name="T41">6,</text:span></text:p>
      <text:p text:style-name="P51">( wenn Gutachten dann bezahlen wir Sie gleich, wenn Sie uns ihre Konto emailen.)</text:p>
      <text:p text:style-name="P8"/>
      <text:p text:style-name="P7">Die Unterlagen von die Berechnung können <text:s/>Sie einsehen bei Steuerberater/Anwalt Herr Liwerski, Lindenallee 23 , Kleve.</text:p>
      <text:p text:style-name="P26"/>
      <text:p text:style-name="P26"/>
      <text:p text:style-name="P24"/>
      <text:p text:style-name="P24"/>
      <text:p text:style-name="P24">Mit freundliche Grüßen,</text:p>
      <text:p text:style-name="P24"/>
      <text:p text:style-name="P24"/>
      <text:p text:style-name="P24"/>
      <text:p text:style-name="P24">Herbrand und Oksana Hofker</text:p>
      <text:p text:style-name="Standard"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13"/>
      <text:p text:style-name="P14"/>
      <text:p text:style-name="P9">Unseres Konto bei die Deutsche Bank</text:p>
      <text:p text:style-name="P9">DE47324700240090215500</text:p>
      <text:p text:style-name="P9"/>
      <text:p text:style-name="P9"/>
      <text:p text:style-name="P14"><text:tab/><text:tab/><text:tab/><text:tab/><text:tab/><text:tab/>Herbrand und Oksana Hofker</text:p>
      <text:p text:style-name="P14"><text:tab/><text:tab/><text:tab/><text:tab/><text:tab/><text:tab/>Hauptstraße 25</text:p>
      <text:p text:style-name="P14"><text:tab/><text:tab/><text:tab/><text:tab/><text:tab/><text:tab/>47533 Kleve Donsbrüggen</text:p>
      <text:p text:style-name="Standard"><text:span text:style-name="T40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30"><text:span text:style-name="T31">L</text:span><text:span text:style-name="T32">iebe Mieter,</text:span></text:p>
      <text:p text:style-name="P54"/>
      <text:p text:style-name="P54"><text:soft-page-break/>Wir wollen probieren in 2016 die Nebenkosten zu reduzieren.</text:p>
      <text:p text:style-name="P29"><text:span text:style-name="T10">Die Heizungs- Abrechnung von Brunata kost viel zu viel, und wir wollen das </text:span><text:span text:style-name="T28">ändern</text:span><text:span text:style-name="T27"> </text:span></text:p>
      <text:p text:style-name="P3"><text:span text:style-name="T29"><text:s/>in <text:s/>die Internet Firma </text:span><text:a xlink:type="simple" xlink:href="http://www.eddi24.de/" text:style-name="Internet_20_link" text:visited-style-name="Visited_20_Internet_20_Link">www.eddi24.de</text:a><text:span text:style-name="T29"> die viel schneller isst und viel weniger kostet </text:span><text:span text:style-name="T30">und es,meinen wir auch besser macht anno 2016.</text:span></text:p>
      <text:p text:style-name="P54">Wir wollen darum ihnen fragen um1.1.2016, oder spätestens <text:s/>7.1.2016 die Heizkörper Messungen selbst zu machen, und uns zu mailen.</text:p>
      <text:p text:style-name="P54">Hierunter haben wir das Nummer von die Messapparaten die bei Ihnen installiert sind.</text:p>
      <text:p text:style-name="P29"><text:span text:style-name="T10">Wenn Sie es nicht vor 7.1.2016 machen kann es das Brunata/Metrona doch kommen </text:span><text:span text:style-name="T26">muss</text:span><text:span text:style-name="T27"> </text:span></text:p>
      <text:p text:style-name="P54"><text:s/>mit unnötige Kosten.</text:p>
      <text:p text:style-name="P58"/>
      <text:p text:style-name="P12">Die Messaparaten haben allen ein Nummer 31555XXX.</text:p>
      <text:p text:style-name="P12"><text:span text:style-name="Internet_20_link">Bitte Email uns Ihre Messungen. (</text:span><text:a xlink:type="simple" xlink:href="mailto:herbrand.hofker@gmail.com" text:style-name="Internet_20_link" text:visited-style-name="Visited_20_Internet_20_Link"><text:span text:style-name="Internet_20_link">herbrand.hofker@gmail.com</text:span></text:a><text:span text:style-name="Internet_20_link">)</text:span></text:p>
      <text:p text:style-name="P12"><text:span text:style-name="Internet_20_link"/></text:p>
      <text:p text:style-name="P12"><text:span text:style-name="Internet_20_link"/></text:p>
      <text:p text:style-name="P12"><draw:frame draw:style-name="fr1" draw:name="Object5" text:anchor-type="paragraph" svg:width="15.759cm" svg:height="3.274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Internet_20_link"/></text:p>
      <text:p text:style-name="P39"><text:span text:style-name="Internet_20_link"><text:span text:style-name="T40"/></text:span></text:p>
      <text:p text:style-name="P14"><text:tab/><text:tab/><text:tab/><text:tab/><text:tab/><text:tab/><text:tab/></text:p>
      <text:p text:style-name="P16">Frau Eichmann</text:p>
      <text:p text:style-name="P16">Hauptstraße 27</text:p>
      <text:p text:style-name="P16">47533 Kleve</text:p>
      <text:p text:style-name="P14"/>
      <text:p text:style-name="P14"/>
      <text:p text:style-name="P14"/>
      <text:p text:style-name="P14"><text:tab/><text:tab/><text:tab/><text:tab/><text:tab/><text:tab/><text:tab/><text:tab/><text:tab/>Kleve-Donsbrüggen, <text:span text:style-name="T43">31</text:span>-12-<text:span text:style-name="T43">2015</text:span></text:p>
      <text:p text:style-name="P14"/>
      <text:p text:style-name="P14"/>
      <text:p text:style-name="P23"/>
      <text:p text:style-name="P23"/>
      <text:p text:style-name="P24"/>
      <text:p text:style-name="P24"/>
      <text:p text:style-name="P24"/>
      <text:p text:style-name="P25">Sehr geehrte <text:s/>Frau Eichmann,</text:p>
      <text:p text:style-name="P24"/>
      <text:p text:style-name="P24"/>
      <text:p text:style-name="P24">Hier isst die Abrechnung Heizung un<text:span text:style-name="T42">d</text:span> Nebenkosten 201<text:span text:style-name="T42">4</text:span>.</text:p>
      <text:p text:style-name="P24"/>
      <text:p text:style-name="P24"/>
      <text:list xml:id="list111350548805149" text:continue-numbering="true" text:style-name="WW8Num1">
        <text:list-item>
          <text:p text:style-name="P47">Heizkosten Abrechnung von Brunata</text:p>
        </text:list-item>
        <text:list-item>
          <text:p text:style-name="P47">Nebenkosten Abrechnung von QuickImmobilie</text:p>
        </text:list-item>
      </text:list>
      <text:p text:style-name="P33"/>
      <text:p text:style-name="P22"><text:span text:style-name="T34">Nachzahlung fuer Heizung <text:s/><text:tab/></text:span><text:span text:style-name="T35">2014</text:span><text:span text:style-name="T34"><text:tab/></text:span><text:span text:style-name="T19">€ <text:s text:c="3"/></text:span><text:span text:style-name="T20">159,02</text:span><text:span text:style-name="T34"> </text:span></text:p>
      <text:p text:style-name="P22"><text:span text:style-name="T34">Nachzahlung fuer Nebenkosten <text:s text:c="2"/></text:span><text:span text:style-name="T35">2014</text:span><text:span text:style-name="T34"> <text:s text:c="4"/></text:span><text:span text:style-name="T19">€ -173,46</text:span><text:span text:style-name="T34"> </text:span></text:p>
      <text:p text:style-name="P27"/>
      <text:p text:style-name="P13"><text:span text:style-name="T34">Zusammen <text:s/>macht das <text:s text:c="8"/></text:span><text:span text:style-name="T19">€</text:span><text:span text:style-name="T23"> <text:s/>83,81 zuruck zu bekommen.</text:span></text:p>
      <text:p text:style-name="P26"/>
      <text:p text:style-name="P6">Bitte bezahlen Sie vor 15 Januar 201<text:span text:style-name="T41">6,</text:span></text:p>
      <text:p text:style-name="P51">( wenn Gutachten dann bezahlen wir Sie gleich, wenn Sie uns ihre Konto emailen.)</text:p>
      <text:p text:style-name="P8"/>
      <text:p text:style-name="P7">Die Unterlagen von die Berechnung können <text:s/>Sie einsehen bei Steuerberater/Anwalt Herr Liwerski, Lindenallee 23 , Kleve.</text:p>
      <text:p text:style-name="P26"/>
      <text:p text:style-name="P24"/>
      <text:p text:style-name="P24"/>
      <text:p text:style-name="P24">Mit freundliche Grüßen,</text:p>
      <text:p text:style-name="P24"/>
      <text:p text:style-name="P24"/>
      <text:p text:style-name="P24"/>
      <text:p text:style-name="P24">Herbrand und Oksana Hofker</text:p>
      <text:p text:style-name="Standard"><text:a xlink:type="simple" xlink:href="mailto:herbrand.hofker@gmail.com" text:style-name="Internet_20_link" text:visited-style-name="Visited_20_Internet_20_Link"><text:span text:style-name="Internet_20_link"><text:span text:style-name="T40">herbrand.hofker@gmail.com</text:span></text:span></text:a></text:p>
      <text:p text:style-name="P14"/>
      <text:p text:style-name="P9">Unseres Konto bei die Deutsche Bank</text:p>
      <text:p text:style-name="P9">DE47324700240090215500</text:p>
      <text:p text:style-name="P9"/>
      <text:p text:style-name="P9"/>
      <text:p text:style-name="P40"/>
      <text:p text:style-name="P30"><text:span text:style-name="T31">L</text:span><text:span text:style-name="T32">iebe Mieter,</text:span></text:p>
      <text:p text:style-name="P54"/>
      <text:p text:style-name="P54">Wir wollen probieren in 2016 die Nebenkosten zu reduzieren.</text:p>
      <text:p text:style-name="P29"><text:span text:style-name="T10">Die Heizungs- Abrechnung von Brunata kost viel zu viel, und wir wollen das </text:span><text:span text:style-name="T28">ändern</text:span><text:span text:style-name="T27"> </text:span></text:p>
      <text:p text:style-name="P3"><text:span text:style-name="T29"><text:s/>in <text:s/>die Internet Firma </text:span><text:a xlink:type="simple" xlink:href="http://www.eddi24.de/" text:style-name="Internet_20_link" text:visited-style-name="Visited_20_Internet_20_Link">www.eddi24.de</text:a><text:span text:style-name="T29"> die viel schneller isst und viel weniger kostet </text:span><text:span text:style-name="T30">und es ,meinen wir auch besser macht anno 2016.</text:span></text:p>
      <text:p text:style-name="P54">Wir wollen darum ihnen fragen um1.1.2016, oder spätestens <text:s/>7.1.2016 die Heizkörper Messungen selbst zu machen, und uns zu mailen.</text:p>
      <text:p text:style-name="P54">Hierunter haben wir das Nummer von die Messapparaten die bei Ihnen installiert sind.</text:p>
      <text:p text:style-name="P29"><text:span text:style-name="T10">Wenn Sie es nicht vor 7.1.2016 machen kann es das Brunata/Metrona doch kommen </text:span><text:span text:style-name="T26">muss</text:span><text:span text:style-name="T27"> </text:span></text:p>
      <text:p text:style-name="P54"><text:s/>mit unnötige Kosten.</text:p>
      <text:p text:style-name="P58"/>
      <text:p text:style-name="P12">Die Messaparaten haben allen ein Nummer 31555XXX.</text:p>
      <text:p text:style-name="P12"><text:span text:style-name="Internet_20_link">Bitte Email uns Ihre Messungen. (</text:span><text:a xlink:type="simple" xlink:href="mailto:herbrand.hofker@gmail.com" text:style-name="Internet_20_link" text:visited-style-name="Visited_20_Internet_20_Link"><text:span text:style-name="Internet_20_link">herbrand.hofker@gmail.com</text:span></text:a><text:span text:style-name="Internet_20_link">)</text:span></text:p>
      <text:p text:style-name="P12"><text:span text:style-name="Internet_20_link"><text:span text:style-name="T33"/></text:span></text:p>
      <text:p text:style-name="P12"><text:span text:style-name="Internet_20_link"><text:span text:style-name="T33"/></text:span></text:p>
      <text:p text:style-name="P12"><text:span text:style-name="Internet_20_link"><text:span text:style-name="T33"/></text:span></text:p>
      <text:p text:style-name="P12"><draw:frame draw:style-name="fr1" draw:name="Object6" text:anchor-type="paragraph" svg:width="15.759cm" svg:height="3.274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Internet_20_link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, helvetica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0:50:11.080000000</meta:creation-date>
    <meta:print-date>2015-12-30T11:13:02.747000000</meta:print-date>
    <meta:editing-duration>P11DT12H36M51S</meta:editing-duration>
    <meta:generator>LibreOffice/5.0.3.2$Windows_x86 LibreOffice_project/e5f16313668ac592c1bfb310f4390624e3dbfb75</meta:generator>
    <dc:date>2015-12-30T11:13:48.317000000</dc:date>
    <meta:editing-cycles>11</meta:editing-cycles>
    <meta:document-statistic meta:table-count="0" meta:image-count="0" meta:object-count="6" meta:page-count="12" meta:paragraph-count="198" meta:word-count="1318" meta:character-count="9357" meta:non-whitespace-character-count="78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Die</text:p>
          </table:table-cell>
          <table:table-cell table:style-name="ce4" office:value-type="string" calcext:value-type="string">
            <text:p>31555294</text:p>
          </table:table-cell>
          <table:table-cell table:style-name="ce3" office:value-type="string" calcext:value-type="string">
            <text:p>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Lad</text:p>
          </table:table-cell>
          <table:table-cell table:style-name="ce4" office:value-type="string" calcext:value-type="string">
            <text:p>31555295</text:p>
          </table:table-cell>
          <table:table-cell table:style-name="ce3" office:value-type="string" calcext:value-type="string">
            <text:p>………………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35:48.950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8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88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89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91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sz</text:p>
          </table:table-cell>
          <table:table-cell table:style-name="ce4" office:value-type="string" calcext:value-type="string">
            <text:p>3155529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sz</text:p>
          </table:table-cell>
          <table:table-cell table:style-name="ce4" office:value-type="string" calcext:value-type="string">
            <text:p>31555298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99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301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1:43.33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7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63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Az</text:p>
          </table:table-cell>
          <table:table-cell table:style-name="ce4" office:value-type="string" calcext:value-type="string">
            <text:p>31555264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66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sz</text:p>
          </table:table-cell>
          <table:table-cell table:style-name="ce4" office:value-type="string" calcext:value-type="string">
            <text:p>3155526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70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1:20.65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5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6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ue</text:p>
          </table:table-cell>
          <table:table-cell table:style-name="ce4" office:value-type="string" calcext:value-type="string">
            <text:p>31555268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ue</text:p>
          </table:table-cell>
          <table:table-cell table:style-name="ce4" office:value-type="string" calcext:value-type="string">
            <text:p>31555269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71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i</text:p>
          </table:table-cell>
          <table:table-cell table:style-name="ce4" office:value-type="string" calcext:value-type="string">
            <text:p>31555272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73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74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2:56.66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75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ue</text:p>
          </table:table-cell>
          <table:table-cell table:style-name="ce4" office:value-type="string" calcext:value-type="string">
            <text:p>31555276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z</text:p>
          </table:table-cell>
          <table:table-cell table:style-name="ce4" office:value-type="string" calcext:value-type="string">
            <text:p>31555279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80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4:38.42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5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Times New Roman" fo:font-size="15pt" style:font-size-asian="15pt" style:font-size-complex="15pt"/>
    </style:style>
    <style:style style:name="ce2" style:family="table-cell" style:parent-style-name="Default" style:data-style-name="N100">
      <style:text-properties style:text-position=""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5pt" style:font-size-asian="15pt" style:font-size-complex="15pt"/>
    </style:style>
    <style:style style:name="ce4" style:family="table-cell" style:parent-style-name="Default" style:data-style-name="N100">
      <style:text-properties style:font-name="Times New Roman" fo:font-size="15pt" style:font-size-asian="15pt" style:font-size-complex="15pt"/>
    </style:style>
  </office:automatic-styles>
  <office:body>
    <office:spreadsheet>
      <table:table table:name="Blad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0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Umschreibung</text:p>
          </table:table-cell>
          <table:table-cell table:style-name="ce3" office:value-type="string" calcext:value-type="string">
            <text:p>Nummer Apparat</text:p>
          </table:table-cell>
          <table:table-cell table:style-name="ce3" office:value-type="string" calcext:value-type="string">
            <text:p>Wer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ad</text:p>
          </table:table-cell>
          <table:table-cell table:style-name="ce4" office:value-type="string" calcext:value-type="string">
            <text:p>31555277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78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Kue</text:p>
          </table:table-cell>
          <table:table-cell table:style-name="ce4" office:value-type="string" calcext:value-type="string">
            <text:p>31555283</text:p>
          </table:table-cell>
          <table:table-cell table:style-name="ce3" office:value-type="string" calcext:value-type="string">
            <text:p>…………………………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Wz</text:p>
          </table:table-cell>
          <table:table-cell table:style-name="ce4" office:value-type="string" calcext:value-type="string">
            <text:p>31555284</text:p>
          </table:table-cell>
          <table:table-cell table:style-name="ce3" office:value-type="string" calcext:value-type="string">
            <text:p>…………………………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-00-0000</text:date>, <text:time style:data-style-name="N2" text:time-value="01:45:42.289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