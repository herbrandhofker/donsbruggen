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 style:line-height-at-least="0.2395in"/>
      <style:text-properties fo:color="#000000" fo:font-size="14pt" style:font-size-asian="14pt" style:font-size-complex="14pt"/>
    </style:style>
    <style:style style:name="P2" style:parent-style-name="Textbody" style:family="paragraph">
      <style:text-properties fo:font-size="14pt" style:font-size-asian="14pt" style:font-size-complex="14pt"/>
    </style:style>
    <style:style style:name="P3" style:parent-style-name="Textbody" style:family="paragraph">
      <style:text-properties fo:font-size="14pt" style:font-size-asian="14pt" style:font-size-complex="14pt"/>
    </style:style>
    <style:style style:name="P4" style:parent-style-name="Textbody" style:family="paragraph">
      <style:text-properties fo:font-size="14pt" style:font-size-asian="14pt" style:font-size-complex="14pt"/>
    </style:style>
    <style:style style:name="P5" style:parent-style-name="Textbody" style:family="paragraph">
      <style:text-properties fo:font-size="14pt" style:font-size-asian="14pt" style:font-size-complex="14pt"/>
    </style:style>
    <style:style style:name="P6" style:parent-style-name="Textbody" style:family="paragraph">
      <style:text-properties fo:font-size="14pt" style:font-size-asian="14pt" style:font-size-complex="14pt"/>
    </style:style>
    <style:style style:name="T7" style:parent-style-name="StrongEmphasis" style:family="text">
      <style:text-properties fo:color="#000000" fo:font-size="14pt" style:font-size-asian="14pt" style:font-size-complex="14pt"/>
    </style:style>
    <style:style style:name="T8" style:parent-style-name="StrongEmphasis" style:family="text">
      <style:text-properties fo:color="#000000"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Textbody" style:family="paragraph">
      <style:text-properties fo:font-size="14pt" style:font-size-asian="14pt" style:font-size-complex="14pt"/>
    </style:style>
    <style:style style:name="T12" style:parent-style-name="Standaardalinea-lettertype" style:family="text">
      <style:text-properties fo:color="#000000" fo:font-size="14pt" style:font-size-asian="14pt" style:font-size-complex="14pt"/>
    </style:style>
    <style:style style:name="T13" style:parent-style-name="Standaardalinea-lettertype" style:family="text">
      <style:text-properties fo:color="#000000" fo:font-size="14pt" style:font-size-asian="14pt" style:font-size-complex="14pt"/>
    </style:style>
    <style:style style:name="T14" style:parent-style-name="StrongEmphasis" style:family="text">
      <style:text-properties fo:color="#000000" fo:font-size="14pt" style:font-size-asian="14pt" style:font-size-complex="14pt"/>
    </style:style>
    <style:style style:name="T15" style:parent-style-name="StrongEmphasis" style:family="text">
      <style:text-properties fo:font-weight="normal" style:font-weight-asian="normal" fo:color="#000000" fo:font-size="14pt" style:font-size-asian="14pt" style:font-size-complex="14pt"/>
    </style:style>
    <style:style style:name="P16" style:parent-style-name="Textbody" style:family="paragraph">
      <style:text-properties fo:font-size="14pt" style:font-size-asian="14pt" style:font-size-complex="14pt"/>
    </style:style>
    <style:style style:name="P17" style:parent-style-name="Textbody" style:family="paragraph">
      <style:text-properties fo:font-size="14pt" style:font-size-asian="14pt" style:font-size-complex="14pt"/>
    </style:style>
    <style:style style:name="P18" style:parent-style-name="Textbody" style:family="paragraph">
      <style:text-properties fo:font-size="14pt" style:font-size-asian="14pt" style:font-size-complex="14pt"/>
    </style:style>
    <style:style style:name="P19" style:parent-style-name="Textbody" style:family="paragraph">
      <style:text-properties fo:font-size="14pt" style:font-size-asian="14pt" style:font-size-complex="14pt"/>
    </style:style>
    <style:style style:name="P20" style:parent-style-name="Textbody" style:family="paragraph">
      <style:text-properties fo:font-size="14pt" style:font-size-asian="14pt" style:font-size-complex="14pt"/>
    </style:style>
    <style:style style:name="P21" style:parent-style-name="Textbody" style:family="paragraph">
      <style:text-properties fo:font-size="14pt" style:font-size-asian="14pt" style:font-size-complex="14pt"/>
    </style:style>
    <style:style style:name="P22" style:parent-style-name="Textbody" style:family="paragraph">
      <style:text-properties fo:font-size="14pt" style:font-size-asian="14pt" style:font-size-complex="14pt"/>
    </style:style>
    <style:style style:name="P23" style:parent-style-name="Textbody" style:family="paragraph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P25" style:parent-style-name="Textbody" style:family="paragraph">
      <style:text-properties fo:font-size="14pt" style:font-size-asian="14pt" style:font-size-complex="14pt"/>
    </style:style>
    <style:style style:name="P26" style:parent-style-name="Textbody" style:family="paragraph">
      <style:text-properties fo:font-size="14pt" style:font-size-asian="14pt" style:font-size-complex="14pt"/>
    </style:style>
    <style:style style:name="T27" style:parent-style-name="Standaardalinea-lettertype" style:family="text">
      <style:text-properties fo:font-size="14pt" style:font-size-asian="14pt" style:font-size-complex="14pt"/>
    </style:style>
    <style:style style:name="T28" style:parent-style-name="Standaardalinea-lettertype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/>
      <text:p text:style-name="P3">Herr Ziesener</text:p>
      <text:p text:style-name="P4">Klosterweg 8</text:p>
      <text:p text:style-name="P5">47574<text:s/>Goch</text:p>
      <text:p text:style-name="P6"><text:tab/><text:tab/><text:tab/><text:tab/><text:tab/><text:tab/><text:tab/><text:tab/>Kleve, Datum: 6.5.2013</text:p>
      <text:p text:style-name="Textbody"/>
      <text:p text:style-name="Textbody"><text:span text:style-name="T7">Betreff: Nebenkostenabrechnung 2012:</text:span></text:p>
      <text:p text:style-name="Textbody"><text:span text:style-name="T8">Hauptstraße 27 47533 Kleve-donsbrüggen</text:span></text:p>
      <text:p text:style-name="P9"/>
      <text:p text:style-name="P10">Sehr geehrte Herr Ziesener,</text:p>
      <text:p text:style-name="P11">anliegend erhalten Sie die Nebenkostenabrechnung für den Abrechnungszeitraum vom 01.01.2012 bis 31.12.2012.</text:p>
      <text:p text:style-name="Textbody"><text:span text:style-name="T12">Es er</text:span><text:span text:style-name="T13">gibt sich eine<text:s/></text:span><text:span text:style-name="T14">Nachzahlung</text:span><text:span text:style-name="T15">.</text:span></text:p>
      <text:p text:style-name="P16">Bitte überweisen Sie den Betrag innerhalb von 14 Tagen auf das folgende Konto:</text:p>
      <text:p text:style-name="P17">Kontoinhaber: Herbrand Hofker</text:p>
      <text:p text:style-name="P18">IBAN: DE47324700240090215500 Bankverbindung Deutsche Bank</text:p>
      <text:p text:style-name="P19">Sollten Sie Abrechnungsunterlagen einsehen wollen, so<text:s/>geben Sie mir bitte Bescheid.</text:p>
      <text:p text:style-name="P20"/>
      <text:p text:style-name="P21">Mit freundlichen Grüßen,</text:p>
      <text:p text:style-name="P22">Herbrand und Oksana Hofker</text:p>
      <text:p text:style-name="P23"/>
      <text:p text:style-name="P24">PS Es waren kalte Monaten okt-dez 2012</text:p>
      <text:p text:style-name="P25"/>
      <text:p text:style-name="P26">Anlagen:</text:p>
      <text:p text:style-name="Textbody"><text:span text:style-name="T27">Betriebskostenabrechnung 2012,Erläuterungen zur Betriebskostenabrechnung, Einzel- und Gesamtabrechnung für die<text:s/></text:span><text:span text:style-name="T28">Heizkost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1" style:display-name="Kop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Kop2" style:display-name="Kop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Kop3" style:display-name="Kop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Ondertitel" style:display-name="Ond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rbrand Hofker</dc:creator>
    <meta:creation-date>2021-09-28T18:22:00Z</meta:creation-date>
    <dc:date>2021-09-28T18:22:00Z</dc:date>
    <meta:print-date>2013-12-06T11:2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8" meta:character-count="793" meta:row-count="5" meta:non-whitespace-character-count="686"/>
  </office:meta>
</office:document-meta>
</file>