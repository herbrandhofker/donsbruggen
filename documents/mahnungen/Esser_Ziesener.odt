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4pt" officeooo:rsid="0006b661" officeooo:paragraph-rsid="0006b661" style:font-size-asian="14pt" style:font-size-complex="14pt"/>
    </style:style>
    <style:style style:name="P3" style:family="paragraph" style:parent-style-name="Text_20_body">
      <style:text-properties fo:font-variant="normal" fo:text-transform="none" style:font-name="Times New Roman" fo:font-size="14pt" fo:letter-spacing="normal" fo:font-weight="normal" style:font-size-asian="14pt" style:font-size-complex="14pt"/>
    </style:style>
    <style:style style:name="P4" style:family="paragraph" style:parent-style-name="Text_20_body">
      <style:text-properties fo:font-variant="normal" fo:text-transform="none" style:font-name="Times New Roman" fo:font-size="14pt" fo:letter-spacing="normal" fo:font-weight="normal" officeooo:rsid="00082fec" officeooo:paragraph-rsid="0006b661" style:font-size-asian="14pt" style:font-size-complex="14pt"/>
    </style:style>
    <style:style style:name="P5" style:family="paragraph" style:parent-style-name="Text_20_body">
      <style:text-properties style:font-name="Times New Roman" fo:font-size="14pt" style:font-size-asian="14pt" style:font-size-complex="14pt"/>
    </style:style>
    <style:style style:name="P6" style:family="paragraph" style:parent-style-name="Text_20_body">
      <style:text-properties style:font-name="Times New Roman" fo:font-size="14pt" officeooo:rsid="00053b8a" style:font-size-asian="14pt" style:font-size-complex="14pt"/>
    </style:style>
    <style:style style:name="P7" style:family="paragraph" style:parent-style-name="Text_20_body">
      <style:text-properties style:font-name="Times New Roman" fo:font-size="14pt" officeooo:rsid="00099a5b" officeooo:paragraph-rsid="00099a5b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499cm" style:contextual-spacing="false" style:line-height-at-least="0.609cm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paragraph-rsid="00053b8a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letter-spacing="normal" fo:font-weight="normal"/>
    </style:style>
    <style:style style:name="T2" style:family="text">
      <style:text-properties fo:font-variant="normal" fo:text-transform="none" fo:letter-spacing="normal" fo:font-weight="normal" officeooo:rsid="00053b8a"/>
    </style:style>
    <style:style style:name="T3" style:family="text">
      <style:text-properties fo:font-variant="normal" fo:text-transform="none" fo:letter-spacing="normal" fo:font-weight="normal" officeooo:rsid="00082fec"/>
    </style:style>
    <style:style style:name="T4" style:family="text">
      <style:text-properties fo:font-variant="normal" fo:text-transform="none" fo:letter-spacing="normal" fo:font-weight="normal" officeooo:rsid="000cefb2"/>
    </style:style>
    <style:style style:name="T5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fo:background-color="transparent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officeooo:rsid="00053b8a" fo:background-color="transparent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officeooo:rsid="00082fec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fo:background-color="transparent" style:font-size-asian="14pt" style:font-style-asian="normal" style:font-size-complex="14pt" style:font-style-complex="normal"/>
    </style:style>
    <style:style style:name="T10" style:family="text">
      <style:text-properties officeooo:rsid="00053b8a"/>
    </style:style>
    <style:style style:name="T11" style:family="text">
      <style:text-properties officeooo:rsid="0006b661"/>
    </style:style>
    <style:style style:name="T12" style:family="text">
      <style:text-properties officeooo:rsid="00082fec"/>
    </style:style>
    <style:style style:name="T13" style:family="text">
      <style:text-properties officeooo:rsid="000cb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ext:p text:style-name="P4"><text:span text:style-name="T13">Herr Ziesener/ </text:span>Frau E<text:span text:style-name="T13">sser</text:span></text:p>
      <text:p text:style-name="P2"><text:span text:style-name="T4">Klosterweg 8</text:span></text:p>
      <text:p text:style-name="P1"><text:span text:style-name="T2">475</text:span><text:span text:style-name="T4">74</text:span><text:span text:style-name="T2"> </text:span><text:span text:style-name="T4">Goch</text:span></text:p>
      <text:p text:style-name="P1"><text:tab/><text:tab/><text:tab/><text:tab/><text:tab/><text:tab/><text:tab/><text:tab/><text:span text:style-name="T10">Kleve, </text:span>Datum: <text:span text:style-name="T10">6</text:span>.<text:span text:style-name="T10">5</text:span>.2013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>Betreff: Nebenkostenabrechnung 2012:</text:span></text:span></text:p>
      <text:p text:style-name="Text_20_body"><text:span text:style-name="Strong_20_Emphasis"><text:span text:style-name="T6">Hauptstraße 2</text:span></text:span><text:span text:style-name="Strong_20_Emphasis"><text:span text:style-name="T7">7</text:span></text:span><text:span text:style-name="Strong_20_Emphasis"><text:span text:style-name="T6"> 47533 Kleve-donsbrüggen</text:span></text:span></text:p>
      <text:p text:style-name="P1"/>
      <text:p text:style-name="P1">Sehr geehrter <text:span text:style-name="T11">Frau</text:span> <text:span text:style-name="T13">Esser/Herr Ziesener</text:span>,</text:p>
      <text:p text:style-name="P1">anliegend erhalten Sie die Nebenkostenabrechnung für den Abrechnungszeitraum vom 01.01.2012 bis 31.12.2012.</text:p>
      <text:p text:style-name="Text_20_body"><text:span text:style-name="T8">Es ergibt sich eine </text:span><text:span text:style-name="Strong_20_Emphasis"><text:span text:style-name="T5">Nachzahlung</text:span></text:span><text:span text:style-name="Strong_20_Emphasis"><text:span text:style-name="T9">.</text:span></text:span></text:p>
      <text:p text:style-name="P1">Bitte überweisen Sie den Betrag innerhalb von 14 Tagen auf das folgende Konto:</text:p>
      <text:p text:style-name="P1">Kontoinhaber: <text:span text:style-name="T10">Herbrand Hofker </text:span></text:p>
      <text:p text:style-name="P6">IBAN: DE47324700240090215500 Bankverbindung Deutsche Bank </text:p>
      <text:p text:style-name="P1">Sollten Sie Abrechnungsunterlagen einsehen wollen, so geben Sie mir bitte Bescheid.</text:p>
      <text:p text:style-name="P1"/>
      <text:p text:style-name="P1">Mit freundlichen Grüßen,</text:p>
      <text:p text:style-name="P1">Herbrand und Oksana Hofker</text:p>
      <text:p text:style-name="P1"/>
      <text:p text:style-name="P7">PS Es waren kalte Monaten okt-dez 2012</text:p>
      <text:p text:style-name="P1"/>
      <text:p text:style-name="P1">Anlagen:</text:p>
      <text:p text:style-name="P3">Betriebskostenabrechnung 2012,Erläuterungen zur Betriebskostenabrechnung, Einzel- und Gesamtabrechnung für die Heizkos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6:55:34.210000000</meta:creation-date>
    <dc:date>2013-12-06T11:25:01.586000000</dc:date>
    <meta:editing-duration>PT2H27M54S</meta:editing-duration>
    <meta:editing-cycles>4</meta:editing-cycles>
    <meta:generator>LibreOffice/4.1.1.2$Windows_x86 LibreOffice_project/7e4286b58adc75a14f6d83f53a03b6c11fa2903</meta:generator>
    <meta:print-date>2013-12-06T11:23:55.496000000</meta:print-date>
    <meta:document-statistic meta:table-count="0" meta:image-count="0" meta:object-count="0" meta:page-count="1" meta:paragraph-count="18" meta:word-count="97" meta:character-count="795" meta:non-whitespace-character-count="706"/>
  </office:meta>
</office:document-meta>
</file>