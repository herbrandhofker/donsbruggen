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8959"/>
    </style:style>
    <style:style style:name="P2" style:family="paragraph" style:parent-style-name="Standard">
      <style:text-properties officeooo:rsid="001dc334" officeooo:paragraph-rsid="001dc334"/>
    </style:style>
    <style:style style:name="P3" style:family="paragraph" style:parent-style-name="Standard">
      <style:text-properties officeooo:rsid="001e74dd" officeooo:paragraph-rsid="001e74dd"/>
    </style:style>
    <style:style style:name="P4" style:family="paragraph" style:parent-style-name="Standard">
      <style:text-properties officeooo:rsid="001f8959" officeooo:paragraph-rsid="001f8959"/>
    </style:style>
    <style:style style:name="P5" style:family="paragraph" style:parent-style-name="Standard">
      <style:text-properties officeooo:rsid="0025a939" officeooo:paragraph-rsid="0025a939"/>
    </style:style>
    <style:style style:name="P6" style:family="paragraph" style:parent-style-name="Standard">
      <style:text-properties officeooo:rsid="001dc334" officeooo:paragraph-rsid="001dc334"/>
    </style:style>
    <style:style style:name="T1" style:family="text">
      <style:text-properties officeooo:rsid="001f8959"/>
    </style:style>
    <style:style style:name="T2" style:family="text">
      <style:text-properties officeooo:rsid="0023cfeb"/>
    </style:style>
    <style:style style:name="T3" style:family="text">
      <style:text-properties officeooo:rsid="0025a939"/>
    </style:style>
    <style:style style:name="T4" style:family="text">
      <style:text-properties officeooo:rsid="00273a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/>
      <text:p text:style-name="P3"/>
      <text:p text:style-name="P3">De heer Taner Cakir</text:p>
      <text:p text:style-name="P3">Edith Pia<text:span text:style-name="T3">f</text:span>fstraat 278</text:p>
      <text:p text:style-name="P3">6663 MA Nijmegen</text:p>
      <text:p text:style-name="P3"/>
      <text:p text:style-name="P3"/>
      <text:p text:style-name="P2"/>
      <text:p text:style-name="P2"><text:tab/><text:tab/><text:tab/><text:tab/><text:tab/><text:span text:style-name="T2"><text:tab/>Lelystad, 6 december 2013</text:span></text:p>
      <text:p text:style-name="P2"/>
      <text:p text:style-name="P2"/>
      <text:p text:style-name="P2">Geachte Heer Cakir,</text:p>
      <text:p text:style-name="P2"/>
      <text:p text:style-name="P5">Hierbij de Heizungskosten abrechnung 2012.</text:p>
      <text:p text:style-name="P5"/>
      <text:p text:style-name="P5"><text:span text:style-name="T4">Gaarne</text:span> het openstaand bedrag op onze bankrekening 608911674 bij de Abnamro storten.</text:p>
      <text:p text:style-name="P4"/>
      <text:p text:style-name="P4"/>
      <text:p text:style-name="P4">Mvg,</text:p>
      <text:p text:style-name="P4"/>
      <text:p text:style-name="P2"/>
      <text:p text:style-name="P2">Herbrand <text:span text:style-name="T3">en Oksana </text:span>Hofker</text:p>
      <text:p text:style-name="P1"><text:span text:style-name="T1">email : </text:span><text:a xlink:type="simple" xlink:href="mailto:herbrandhofker@yahoo.com" text:style-name="Internet_20_link" text:visited-style-name="Visited_20_Internet_20_Link"><text:span text:style-name="T1">herbrand.hofker@gmail.com</text:span></text:a></text:p>
      <text:p text:style-name="P4">Tel : 0654290955</text:p>
      <text:p text:style-name="P4">Adres:</text:p>
      <text:p text:style-name="P2">Oudaen 26</text:p>
      <text:p text:style-name="P2">8219 AB Lelysta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4T14:12:15.39</meta:creation-date>
    <dc:date>2013-12-05T16:42:06.505000000</dc:date>
    <meta:editing-duration>PT33M30S</meta:editing-duration>
    <meta:editing-cycles>6</meta:editing-cycles>
    <meta:generator>LibreOffice/5.1.4.2$Windows_x86 LibreOffice_project/f99d75f39f1c57ebdd7ffc5f42867c12031db97a</meta:generator>
    <meta:print-date>2013-08-14T14:48:34.14</meta:print-date>
    <meta:document-statistic meta:table-count="0" meta:image-count="0" meta:object-count="0" meta:page-count="1" meta:paragraph-count="14" meta:word-count="51" meta:character-count="340" meta:non-whitespace-character-count="297"/>
  </office:meta>
</office:document-meta>
</file>