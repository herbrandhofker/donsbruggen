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8959"/>
    </style:style>
    <style:style style:name="P2" style:family="paragraph" style:parent-style-name="Standard">
      <style:text-properties style:font-name="Times New Roman" fo:font-size="12pt" officeooo:rsid="001dc334" officeooo:paragraph-rsid="001dc334" style:font-size-asian="12pt" style:font-size-complex="12pt"/>
    </style:style>
    <style:style style:name="P3" style:family="paragraph" style:parent-style-name="Standard">
      <style:text-properties style:font-name="Times New Roman" fo:font-size="12pt" officeooo:rsid="001e74dd" officeooo:paragraph-rsid="001e74dd" style:font-size-asian="12pt" style:font-size-complex="12pt"/>
    </style:style>
    <style:style style:name="P4" style:family="paragraph" style:parent-style-name="Standard">
      <style:text-properties style:font-name="Times New Roman" fo:font-size="12pt" officeooo:rsid="002a727f" officeooo:paragraph-rsid="002a727f" style:font-size-asian="12pt" style:font-size-complex="12pt"/>
    </style:style>
    <style:style style:name="P5" style:family="paragraph" style:parent-style-name="Standard">
      <style:text-properties style:font-name="Times New Roman" fo:font-size="12pt" officeooo:rsid="002c22a0" officeooo:paragraph-rsid="002c22a0" style:font-size-asian="12pt" style:font-size-complex="12pt"/>
    </style:style>
    <style:style style:name="P6" style:family="paragraph" style:parent-style-name="Standard">
      <style:text-properties style:font-name="Times New Roman" fo:font-size="12pt" officeooo:rsid="0025a939" officeooo:paragraph-rsid="002a727f" style:font-size-asian="12pt" style:font-size-complex="12pt"/>
    </style:style>
    <style:style style:name="P7" style:family="paragraph" style:parent-style-name="Standard">
      <style:text-properties style:font-name="Times New Roman" fo:font-size="12pt" officeooo:rsid="0025a939" officeooo:paragraph-rsid="002cb2e8" style:font-size-asian="12pt" style:font-size-complex="12pt"/>
    </style:style>
    <style:style style:name="P8" style:family="paragraph" style:parent-style-name="Standard">
      <style:text-properties style:font-name="Times New Roman" fo:font-size="12pt" officeooo:rsid="001f8959" officeooo:paragraph-rsid="001f8959" style:font-size-asian="12pt" style:font-size-complex="12pt"/>
    </style:style>
    <style:style style:name="P9" style:family="paragraph" style:parent-style-name="Standard">
      <style:text-properties style:font-name="Times New Roman" fo:font-size="12pt" officeooo:rsid="002c22a0" officeooo:paragraph-rsid="002c22a0" style:font-size-asian="12pt" style:font-size-complex="12pt"/>
    </style:style>
    <style:style style:name="P10" style:family="paragraph" style:parent-style-name="Standard">
      <style:text-properties style:font-name="Times New Roman" fo:font-size="12pt" officeooo:rsid="002cd57c" officeooo:paragraph-rsid="002cd57c" style:font-size-asian="12pt" style:font-size-complex="12pt"/>
    </style:style>
    <style:style style:name="T1" style:family="text">
      <style:text-properties officeooo:rsid="0023cfeb"/>
    </style:style>
    <style:style style:name="T2" style:family="text">
      <style:text-properties officeooo:rsid="0025a939"/>
    </style:style>
    <style:style style:name="T3" style:family="text">
      <style:text-properties officeooo:rsid="00273a97"/>
    </style:style>
    <style:style style:name="T4" style:family="text">
      <style:text-properties officeooo:rsid="002c22a0"/>
    </style:style>
    <style:style style:name="T5" style:family="text">
      <style:text-properties fo:font-variant="normal" fo:text-transform="none" fo:color="#333333" fo:letter-spacing="normal" fo:font-style="normal" fo:font-weight="normal" officeooo:rsid="001dc334"/>
    </style:style>
    <style:style style:name="T6" style:family="text">
      <style:text-properties style:font-name="Times New Roman" fo:font-size="12pt" officeooo:rsid="001f8959" style:font-size-asian="12pt" style:font-size-complex="12pt"/>
    </style:style>
    <style:style style:name="T7" style:family="text">
      <style:text-properties officeooo:rsid="001dc334"/>
    </style:style>
    <style:style style:name="T8" style:family="text">
      <style:text-properties officeooo:rsid="002cb2e8"/>
    </style:style>
    <style:style style:name="T9" style:family="text">
      <style:text-properties officeooo:rsid="002cd5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/>
      <text:p text:style-name="P3"/>
      <text:p text:style-name="P3">De heer Taner Cakir</text:p>
      <text:p text:style-name="P3">Edith Pia<text:span text:style-name="T2">f</text:span>fstraat 278</text:p>
      <text:p text:style-name="P3">6663 MA Nijmegen</text:p>
      <text:p text:style-name="P3"/>
      <text:p text:style-name="P3"/>
      <text:p text:style-name="P2"/>
      <text:p text:style-name="P2"><text:tab/><text:tab/><text:tab/><text:tab/><text:tab/><text:span text:style-name="T1"><text:tab/>Lelystad, 14 <text:s/>december 2016</text:span></text:p>
      <text:p text:style-name="P2"/>
      <text:p text:style-name="P2"/>
      <text:p text:style-name="P2">Geachte Heer Cakir,</text:p>
      <text:p text:style-name="P2"/>
      <text:p text:style-name="P4">Hierbij herinnering betreffende de Nebenkosten en Heizkosten 2012 en 2013.</text:p>
      <text:p text:style-name="P4">U heeft deze rekeningen ontvangen op <text:span text:style-name="T4">resp. 6 december 2013 <text:s/>en 11 </text:span><text:s/><text:span text:style-name="T9">februari</text:span> 2014.</text:p>
      <text:p text:style-name="P4"/>
      <text:p text:style-name="P5">Er staat open:</text:p>
      <text:p text:style-name="P5"/>
      <text:p text:style-name="P5">Heizkosten 2012 <text:s text:c="3"/>: <text:s/>679,70 euro</text:p>
      <text:p text:style-name="P5">Nebenkosten 2012 : <text:s/>746,02 euro</text:p>
      <text:p text:style-name="P5">Maankosten <text:tab/>: <text:s text:c="10"/>90,00 euro</text:p>
      <text:p text:style-name="P5"/>
      <text:p text:style-name="P5">Heizkosten 2013 <text:s text:c="3"/>: <text:s/>153,50 euro</text:p>
      <text:p text:style-name="P5">Nebenkosten 2013 : <text:s/>386,25 euro</text:p>
      <text:p text:style-name="P5">Maankosten <text:s text:c="10"/>: <text:s text:c="3"/>45,00 euro</text:p>
      <text:p text:style-name="P5"/>
      <text:p text:style-name="P5">Totaal <text:s/>openstaand: <text:s text:c="2"/>2.045,47 euro</text:p>
      <text:p text:style-name="P6"/>
      <text:p text:style-name="P7"><text:span text:style-name="T3">Gaarne</text:span> het openstaand bedrag op onze bankrekening <text:span text:style-name="T5">NL53 ABNA 0608 9116 74</text:span><text:span text:style-name="T7"> </text:span><text:s/>bij de Abnamro storten.</text:p>
      <text:p text:style-name="P5">Indien we geen betaling ontvangen hebben voor <text:span text:style-name="T8">31 </text:span>december 2016 wordt wettelijke rente berekend</text:p>
      <text:p text:style-name="P5">over het openstaande bedrag, en volgen er helaas meer incassokosten.</text:p>
      <text:p text:style-name="P8"/>
      <text:p text:style-name="P5">Deze openstaande posten zijn <text:s/>exclusief de kosten die u nog moet betalen aan het incassobureau vanwege uitspraak rechter.</text:p>
      <text:p text:style-name="P5"/>
      <text:p text:style-name="P10">Voor de volledigheid sturen we hierbij alle afrekeningen als bijlage hierbij:</text:p>
      <text:p text:style-name="P10">Heizkosten 2012</text:p>
      <text:p text:style-name="P10">Nebenkosten 2012</text:p>
      <text:p text:style-name="P10">Heizkosten 2013</text:p>
      <text:p text:style-name="P10">Nebenkosten 2013</text:p>
      <text:p text:style-name="P5"/>
      <text:p text:style-name="P5">Hoogachtend,</text:p>
      <text:p text:style-name="P2"/>
      <text:p text:style-name="P2">Herbrand <text:span text:style-name="T2">en Oksana </text:span>Hofker</text:p>
      <text:p text:style-name="P1"><text:span text:style-name="T6">email : </text:span><text:a xlink:type="simple" xlink:href="mailto:herbrandhofker@yahoo.com" text:style-name="Internet_20_link" text:visited-style-name="Visited_20_Internet_20_Link"><text:span text:style-name="T6">herbrand.hofker@gmail.com</text:span></text:a></text:p>
      <text:p text:style-name="P8">Tel : 0654290955</text:p>
      <text:p text:style-name="P8">Adres:</text:p>
      <text:p text:style-name="P2">Oudaen 26</text:p>
      <text:p text:style-name="P2">8219 AB Lelyst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4T14:12:15.39</meta:creation-date>
    <dc:date>2016-12-13T19:22:18.154000000</dc:date>
    <meta:editing-duration>PT57M14S</meta:editing-duration>
    <meta:editing-cycles>10</meta:editing-cycles>
    <meta:generator>LibreOffice/5.1.4.2$Windows_x86 LibreOffice_project/f99d75f39f1c57ebdd7ffc5f42867c12031db97a</meta:generator>
    <meta:print-date>2016-12-13T19:05:02.370000000</meta:print-date>
    <meta:document-statistic meta:table-count="0" meta:image-count="0" meta:object-count="0" meta:page-count="1" meta:paragraph-count="31" meta:word-count="170" meta:character-count="1146" meta:non-whitespace-character-count="959"/>
  </office:meta>
</office:document-meta>
</file>