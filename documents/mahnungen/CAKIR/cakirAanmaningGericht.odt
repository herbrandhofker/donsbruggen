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c334"/>
    </style:style>
    <style:style style:name="P2" style:family="paragraph" style:parent-style-name="Standard">
      <style:text-properties officeooo:paragraph-rsid="001f8959"/>
    </style:style>
    <style:style style:name="P3" style:family="paragraph" style:parent-style-name="Standard">
      <style:text-properties officeooo:rsid="001dc334" officeooo:paragraph-rsid="001dc334"/>
    </style:style>
    <style:style style:name="P4" style:family="paragraph" style:parent-style-name="Standard">
      <style:text-properties officeooo:rsid="001e74dd" officeooo:paragraph-rsid="001e74dd"/>
    </style:style>
    <style:style style:name="P5" style:family="paragraph" style:parent-style-name="Standard">
      <style:text-properties officeooo:rsid="001f8959" officeooo:paragraph-rsid="001f8959"/>
    </style:style>
    <style:style style:name="T1" style:family="text">
      <style:text-properties officeooo:rsid="001dc334"/>
    </style:style>
    <style:style style:name="T2" style:family="text">
      <style:text-properties officeooo:rsid="001e74dd"/>
    </style:style>
    <style:style style:name="T3" style:family="text">
      <style:text-properties officeooo:rsid="001f8959"/>
    </style:style>
    <style:style style:name="T4" style:family="text">
      <style:text-properties officeooo:rsid="002209b7"/>
    </style:style>
    <style:style style:name="T5" style:family="text">
      <style:text-properties officeooo:rsid="0023c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/>
      <text:p text:style-name="P4"/>
      <text:p text:style-name="P4">De heer Taner Cakir</text:p>
      <text:p text:style-name="P4">Edith Piafstraat 278</text:p>
      <text:p text:style-name="P4">6663 MA Nijmegen</text:p>
      <text:p text:style-name="P4"/>
      <text:p text:style-name="P4"/>
      <text:p text:style-name="P3"/>
      <text:p text:style-name="P3"><text:tab/><text:tab/><text:tab/><text:tab/><text:tab/><text:span text:style-name="T5"><text:tab/>Lelystad, 15 augustus 2013</text:span></text:p>
      <text:p text:style-name="P3"/>
      <text:p text:style-name="P3"/>
      <text:p text:style-name="P1"><text:span text:style-name="T1">Geachte Heer </text:span><text:span text:style-name="T2">Cakir,</text:span></text:p>
      <text:p text:style-name="P3"/>
      <text:p text:style-name="P5">Volgens de uitspraak van Amtsgericht Kleve van 7 juni 2013 dient u ons te betalen</text:p>
      <text:p text:style-name="P5">1.344 euro</text:p>
      <text:p text:style-name="P5"/>
      <text:p text:style-name="P2"><text:span text:style-name="T3">Wij verzoeken u dringend dit bedrag over te maken op onze rekening bij de ABN Am</text:span><text:span text:style-name="T4">r</text:span><text:span text:style-name="T3">o:</text:span></text:p>
      <text:p text:style-name="P5">608911674 t.n.v H.Hofker</text:p>
      <text:p text:style-name="P5"><text:s/></text:p>
      <text:p text:style-name="P5">Indien dit bedrag niet op 31 augustus 2013 moeten we helaas een deurwaarder inschakelen waardoot extra kosten ontstaan, inclusief rente vanaf 7 juni 2013 over het bedrag van 1.344 euro.</text:p>
      <text:p text:style-name="P5"/>
      <text:p text:style-name="P5"/>
      <text:p text:style-name="P5">Mvg,</text:p>
      <text:p text:style-name="P5"/>
      <text:p text:style-name="P3"/>
      <text:p text:style-name="P3">Herbrand Hofker</text:p>
      <text:p text:style-name="P2"><text:span text:style-name="T3">email : </text:span><text:a xlink:type="simple" xlink:href="mailto:herbrandhofker@yahoo.com"><text:span text:style-name="T3">herbrandhofker@yahoo.com</text:span></text:a></text:p>
      <text:p text:style-name="P5">Tel : 0654290955</text:p>
      <text:p text:style-name="P5">Tel: 0320411419</text:p>
      <text:p text:style-name="P5">Adres:</text:p>
      <text:p text:style-name="P3">Oudaen 26</text:p>
      <text:p text:style-name="P3">8219 AB Lelysta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4:12:15.39</meta:creation-date>
    <dc:date>2013-09-08T21:25:34.99</dc:date>
    <meta:editing-duration>PT33M30S</meta:editing-duration>
    <meta:editing-cycles>5</meta:editing-cycles>
    <meta:generator>LibreOffice/4.0.4.2$Windows_x86 LibreOffice_project/9e9821abd0ffdbc09cd8c52eaa574fa09eb08f2</meta:generator>
    <meta:print-date>2013-08-14T14:48:34.14</meta:print-date>
    <meta:document-statistic meta:table-count="0" meta:image-count="0" meta:object-count="0" meta:page-count="1" meta:paragraph-count="19" meta:word-count="100" meta:character-count="603" meta:non-whitespace-character-count="514"/>
  </office:meta>
</office:document-meta>
</file>