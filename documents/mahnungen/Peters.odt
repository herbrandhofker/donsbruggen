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Georgia, 'Times New Roman', Times, 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4pt" officeooo:rsid="0006b661" officeooo:paragraph-rsid="0006b661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.499cm" style:contextual-spacing="false" style:line-height-at-least="0.609cm" fo:text-align="start" style:justify-single-word="false" fo:text-indent="0cm" style:auto-text-indent="false"/>
      <style:text-properties fo:color="#000000" style:font-name="Times New Roman" fo:font-size="14pt" fo:font-style="normal" style:text-underline-style="none" officeooo:paragraph-rsid="00053b8a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officeooo:rsid="00053b8a"/>
    </style:style>
    <style:style style:name="T3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fo:background-color="transparent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053b8a" fo:background-color="transparent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style:font-name="Times New Roman" fo:letter-spacing="normal" fo:font-style="normal" style:text-underline-style="none" fo:font-weight="bold" fo:background-color="transparent" style:font-style-asian="normal" style:font-style-complex="normal"/>
    </style:style>
    <style:style style:name="T8" style:family="text">
      <style:text-properties fo:font-variant="normal" fo:text-transform="none" fo:color="#000000" style:font-name="Times New Roman" fo:letter-spacing="normal" fo:font-style="normal" style:text-underline-style="none" fo:font-weight="bold" officeooo:rsid="00053b8a" fo:background-color="transparent" style:font-style-asian="normal" style:font-style-complex="normal"/>
    </style:style>
    <style:style style:name="T9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style-complex="normal"/>
    </style:style>
    <style:style style:name="T10" style:family="text">
      <style:text-properties fo:font-variant="normal" fo:text-transform="none" fo:color="#000000" style:font-name="Times New Roman" fo:letter-spacing="normal" fo:font-style="normal" style:text-underline-style="none" fo:font-weight="normal" fo:background-color="transparent" style:font-style-asian="normal" style:font-style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bold" fo:background-color="transparent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bold" officeooo:rsid="00053b8a" fo:background-color="transparent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style:font-size-asian="14pt" style:font-style-asian="normal" style:font-size-complex="14pt" style:font-style-complex="normal"/>
    </style:style>
    <style:style style:name="T15" style:family="text">
      <style:text-properties officeooo:rsid="00053b8a"/>
    </style:style>
    <style:style style:name="T16" style:family="text">
      <style:text-properties style:font-name="arial"/>
    </style:style>
    <style:style style:name="T17" style:family="text">
      <style:text-properties style:font-name="arial" fo:font-weight="bold"/>
    </style:style>
    <style:style style:name="T18" style:family="text">
      <style:text-properties style:font-name="arial" fo:font-weight="bold" officeooo:rsid="00053b8a"/>
    </style:style>
    <style:style style:name="T19" style:family="text">
      <style:text-properties style:font-name="arial" officeooo:rsid="00053b8a"/>
    </style:style>
    <style:style style:name="T20" style:family="text">
      <style:text-properties officeooo:rsid="0006b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1"><text:span text:style-name="T1"/></text:p>
      <text:p text:style-name="P2"><text:span text:style-name="T2">F</text:span><text:span text:style-name="T1">am Peters</text:span></text:p>
      <text:p text:style-name="P2"><text:span text:style-name="T2">K</text:span><text:span text:style-name="T1">lever strasse 27</text:span></text:p>
      <text:p text:style-name="P1"><text:span text:style-name="T2">47559 Kranenburg</text:span></text:p>
      <text:p text:style-name="P1"><text:tab/><text:tab/><text:tab/><text:tab/><text:tab/><text:tab/><text:tab/><text:tab/><text:span text:style-name="T15">Kleve, </text:span>Datum: <text:span text:style-name="T15">6</text:span>.<text:span text:style-name="T15">5</text:span>.2013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Betreff: Nebenkostenabrechnung 2012:</text:span></text:span></text:p>
      <text:p text:style-name="Text_20_body"><text:span text:style-name="Strong_20_Emphasis"><text:span text:style-name="T4">Hauptstraße 25/27 47533 Kleve-donsbrüggen</text:span></text:span></text:p>
      <text:p text:style-name="P1"/>
      <text:p text:style-name="P1">Sehr geehrter Herr/<text:span text:style-name="T20">Frau</text:span> <text:span text:style-name="T20">Peters</text:span>,</text:p>
      <text:p text:style-name="P1">anliegend erhalten Sie die Nebenkostenabrechnung für den Abrechnungszeitraum vom 01.01.2012 bis 31.12.2012.</text:p>
      <text:p text:style-name="Text_20_body"><text:span text:style-name="T5">Es ergibt sich eine </text:span><text:span text:style-name="Strong_20_Emphasis"><text:span text:style-name="T3">Nachzahlung</text:span></text:span><text:span text:style-name="Strong_20_Emphasis"><text:span text:style-name="T6">.</text:span></text:span></text:p>
      <text:p text:style-name="P1">Bitte überweisen Sie den Betrag innerhalb von 14 Tagen auf das folgende Konto:</text:p>
      <text:p text:style-name="P1">Kontoinhaber: <text:span text:style-name="T15">Herbrand Hofker </text:span></text:p>
      <text:p text:style-name="P1"><text:span text:style-name="T15">IBAN: DE47324700240090215500 Bankverbindung Deutsche Bank </text:span></text:p>
      <text:p text:style-name="P1">Sollten Sie Abrechnungsunterlagen einsehen wollen, so geben Sie mir bitte Bescheid.</text:p>
      <text:p text:style-name="P1"/>
      <text:p text:style-name="P1">Mit freundlichen Grüßen,</text:p>
      <text:p text:style-name="P1">Herbrand und Oksana Hofker</text:p>
      <text:p text:style-name="P1"/>
      <text:p text:style-name="P1"/>
      <text:p text:style-name="P1">Anlagen:</text:p>
      <text:p text:style-name="P1"><text:span text:style-name="T1">Betriebskostenabrechnung 2012,Erläuterungen zur Betriebskostenabrechnung, Einzel- und Gesamtabrechnung für die Heizkos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erif" svg:font-family="'Droid Serif', Georgia, 'Times New Roman', Times, 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6:55:34.210000000</meta:creation-date>
    <dc:date>2013-12-05T17:17:50.141000000</dc:date>
    <meta:editing-duration>P0D</meta:editing-duration>
    <meta:editing-cycles>1</meta:editing-cycles>
    <meta:generator>LibreOffice/4.1.1.2$Windows_x86 LibreOffice_project/7e4286b58adc75a14f6d83f53a03b6c11fa2903</meta:generator>
    <meta:print-date>2013-12-05T17:12:29.391000000</meta:print-date>
    <meta:document-statistic meta:table-count="0" meta:image-count="0" meta:object-count="0" meta:page-count="1" meta:paragraph-count="17" meta:word-count="88" meta:character-count="748" meta:non-whitespace-character-count="667"/>
  </office:meta>
</office:document-meta>
</file>