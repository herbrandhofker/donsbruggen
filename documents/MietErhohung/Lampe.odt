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139097" officeooo:paragraph-rsid="00139097"/>
    </style:style>
    <style:style style:name="P3" style:family="paragraph" style:parent-style-name="Standard">
      <style:text-properties style:font-name="Times New Roman" fo:font-size="18pt" fo:language="de" fo:country="DE" style:font-size-asian="18pt" style:font-size-complex="18pt"/>
    </style:style>
    <style:style style:name="P4" style:family="paragraph" style:parent-style-name="Standard">
      <style:text-properties fo:color="#000000" style:font-name="Times New Roman" fo:font-size="18pt" fo:language="de" fo:country="DE" fo:font-weight="bold" officeooo:rsid="00139097" officeooo:paragraph-rsid="00139097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style:font-name="Times New Roman" fo:font-size="18pt" fo:language="de" fo:country="DE" fo:font-weight="bold" officeooo:paragraph-rsid="00139097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style:font-name="Times New Roman" fo:font-size="18pt" fo:language="de" fo:country="DE" fo:font-weight="bold" officeooo:rsid="00151466" officeooo:paragraph-rsid="00151466" style:font-size-asian="18pt" style:font-weight-asian="bold" style:font-size-complex="18pt" style:font-weight-complex="bold"/>
    </style:style>
    <style:style style:name="P7" style:family="paragraph" style:parent-style-name="Standard" style:master-page-name="Standard">
      <style:paragraph-properties style:page-number="auto"/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fc0d8"/>
    </style:style>
    <style:style style:name="T3" style:family="text">
      <style:text-properties fo:language="de" fo:country="DE" officeooo:rsid="00109cd7"/>
    </style:style>
    <style:style style:name="T4" style:family="text">
      <style:text-properties fo:language="de" fo:country="DE" officeooo:rsid="00139097"/>
    </style:style>
    <style:style style:name="T5" style:family="text">
      <style:text-properties fo:language="de" fo:country="DE" officeooo:rsid="00167b75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officeooo:rsid="00109c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/>
      <text:p text:style-name="P1"><text:tab/><text:tab/><text:tab/><text:tab/><text:tab/><text:tab/>Herbrand und Oksana Hofker</text:p>
      <text:p text:style-name="P1"><text:tab/><text:tab/><text:tab/><text:tab/><text:tab/><text:tab/>Hauptstraße 25</text:p>
      <text:p text:style-name="P1"><text:tab/><text:tab/><text:tab/><text:tab/><text:tab/><text:tab/>47533 Kleve Donsbrüggen</text:p>
      <text:p text:style-name="Standard"><text:span text:style-name="T1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1">herbrand.hofker@gmail.com</text:span></text:span></text:a></text:p>
      <text:p text:style-name="P1"><text:tab/><text:tab/><text:tab/><text:tab/><text:tab/><text:tab/><text:tab/></text:p>
      <text:p text:style-name="P1"/>
      <text:p text:style-name="P4"><text:s text:c="2"/>Herr Lampe</text:p>
      <text:p text:style-name="P5"><text:span text:style-name="T6"><text:s text:c="2"/>Lindenallee 33</text:span><text:line-break/> <text:s/><text:span text:style-name="T6">47533 Kleve</text:span> </text:p>
      <text:p text:style-name="P6"><text:s text:c="2"/>Deutschland</text:p>
      <text:p text:style-name="P3"/>
      <text:p text:style-name="P1"/>
      <text:p text:style-name="Standard"><text:span text:style-name="T1"><text:tab/><text:tab/><text:tab/><text:tab/><text:tab/><text:tab/><text:tab/><text:tab/>Kleve-Donsbrüggen, </text:span><text:span text:style-name="T5">15</text:span><text:span text:style-name="T2">.</text:span><text:span text:style-name="T4">1</text:span><text:span text:style-name="T5">1</text:span><text:span text:style-name="T3">.</text:span><text:span text:style-name="T1">201</text:span><text:span text:style-name="T2">8</text:span></text:p>
      <text:p text:style-name="P1"/>
      <text:p text:style-name="P1"/>
      <text:p text:style-name="P1"/>
      <text:p text:style-name="P1"/>
      <text:p text:style-name="P2">Sehr geehrte Herr Lampe</text:p>
      <text:p text:style-name="P2"/>
      <text:p text:style-name="P1"/>
      <text:p text:style-name="P2">Wir haben verstehen Sie haben Fragen über die <text:s/><text:span text:style-name="T7">Mieterhöhung </text:span>für Frau Eichmann.</text:p>
      <text:p text:style-name="P2"/>
      <text:p text:style-name="P2">Ich habe Ihnen letzte Monat ein Email darüber geschickt (sehe Beilage).</text:p>
      <text:p text:style-name="P2">Vielleicht haben Sie diese nicht gelesen. Darum hier auf Papier nochmals.</text:p>
      <text:p text:style-name="P2"/>
      <text:p text:style-name="P2"/>
      <text:p text:style-name="P1">Mit freundliche Grüßen,</text:p>
      <text:p text:style-name="P1"/>
      <text:p text:style-name="P1"/>
      <text:p text:style-name="P1"/>
      <text:p text:style-name="P1">Herbrand und Oksana Hofker</text:p>
      <text:p text:style-name="P2">Oudaen 26</text:p>
      <text:p text:style-name="P2">8219 AB Lelystad</text:p>
      <text:p text:style-name="P2">Niederlande</text:p>
      <text:p text:style-name="P2">Email : herbrand.hofker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50:11.080000000</meta:creation-date>
    <meta:print-date>2018-10-03T09:11:55.254000000</meta:print-date>
    <meta:editing-duration>P11DT12H44M19S</meta:editing-duration>
    <dc:date>2018-11-16T11:39:56.141000000</dc:date>
    <meta:editing-cycles>5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9" meta:word-count="75" meta:character-count="583" meta:non-whitespace-character-count="477"/>
  </office:meta>
</office:document-meta>
</file>