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arial, helvetica, 'droid sans', sans-serif"/>
    <style:font-face style:name="sans-serif" svg:font-family="sans-serif, Ari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language="de" fo:country="DE" fo:font-weight="bold" officeooo:rsid="000fc0d8" style:font-weight-asian="bold" style:font-weight-complex="bold"/>
    </style:style>
    <style:style style:name="P4" style:family="paragraph" style:parent-style-name="Standard">
      <style:text-properties fo:language="de" fo:country="DE" officeooo:rsid="00109cd7" officeooo:paragraph-rsid="00109cd7"/>
    </style:style>
    <style:style style:name="P5" style:family="paragraph" style:parent-style-name="Standard">
      <style:text-properties officeooo:paragraph-rsid="00109cd7"/>
    </style:style>
    <style:style style:name="P6" style:family="paragraph" style:parent-style-name="Standard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style:page-number="auto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fc0d8" style:font-weight-asian="normal" style:font-weight-complex="normal"/>
    </style:style>
    <style:style style:name="T4" style:family="text">
      <style:text-properties fo:language="de" fo:country="DE" officeooo:rsid="000fc0d8"/>
    </style:style>
    <style:style style:name="T5" style:family="text">
      <style:text-properties fo:language="de" fo:country="DE" officeooo:rsid="00109cd7"/>
    </style:style>
    <style:style style:name="T6" style:family="text">
      <style:text-properties fo:language="de" fo:country="DE" officeooo:rsid="00129c85"/>
    </style:style>
    <style:style style:name="T7" style:family="text">
      <style:text-properties fo:language="de" fo:country="DE" officeooo:rsid="0014347d"/>
    </style:style>
    <style:style style:name="T8" style:family="text">
      <style:text-properties fo:font-variant="normal" fo:text-transform="none" fo:color="#252525" fo:letter-spacing="normal"/>
    </style:style>
    <style:style style:name="T9" style:family="text">
      <style:text-properties fo:font-variant="normal" fo:text-transform="none" fo:color="#252525" fo:letter-spacing="normal" fo:language="de" fo:country="DE"/>
    </style:style>
    <style:style style:name="T10" style:family="text">
      <style:text-properties fo:font-variant="normal" fo:text-transform="none" fo:color="#252525" fo:letter-spacing="normal" fo:language="de" fo:country="DE" officeooo:rsid="00109cd7"/>
    </style:style>
    <style:style style:name="T11" style:family="text">
      <style:text-properties fo:font-variant="normal" fo:text-transform="none" fo:color="#252525" fo:letter-spacing="normal" fo:language="de" fo:country="DE" officeooo:rsid="00129c85"/>
    </style:style>
    <style:style style:name="T12" style:family="text">
      <style:text-properties fo:font-variant="normal" fo:text-transform="none" fo:color="#252525" style:font-name="sans-serif" fo:font-size="10pt" fo:letter-spacing="normal" fo:language="de" fo:country="DE" fo:font-style="normal" fo:font-weight="bold" style:font-size-asian="10pt" style:font-style-asian="normal" style:font-weight-asian="bold" style:font-name-complex="sans-serif"/>
    </style:style>
    <style:style style:name="T13" style:family="text">
      <style:text-properties fo:font-variant="normal" fo:text-transform="none" fo:color="#333333" style:font-name="Open Sans" fo:letter-spacing="normal" fo:font-style="normal" fo:font-weight="normal"/>
    </style:style>
    <style:style style:name="T14" style:family="text">
      <style:text-properties fo:font-variant="normal" fo:text-transform="none" fo:color="#333333" style:font-name="Open Sans" fo:letter-spacing="normal" fo:font-style="normal" fo:font-weight="normal" officeooo:rsid="00109cd7"/>
    </style:style>
    <style:style style:name="T15" style:family="text">
      <style:text-properties officeooo:rsid="00109c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/>
      <text:p text:style-name="P1"><text:tab/><text:tab/><text:tab/><text:tab/><text:tab/><text:tab/>Herbrand und Oksana Hofker</text:p>
      <text:p text:style-name="P1"><text:tab/><text:tab/><text:tab/><text:tab/><text:tab/><text:tab/>Hauptstraße 25</text:p>
      <text:p text:style-name="P1"><text:tab/><text:tab/><text:tab/><text:tab/><text:tab/><text:tab/>47533 Kleve Donsbrüggen</text:p>
      <text:p text:style-name="Standard"><text:span text:style-name="T1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1">herbrand.hofker@gmail.com</text:span></text:span></text:a></text:p>
      <text:p text:style-name="P1"><text:tab/><text:tab/><text:tab/><text:tab/><text:tab/><text:tab/><text:tab/></text:p>
      <text:p text:style-name="P1"/>
      <text:p text:style-name="P1"/>
      <text:p text:style-name="P1"/>
      <text:p text:style-name="P3">Frau Eichmann</text:p>
      <text:p text:style-name="P2">Hauptstraße 27</text:p>
      <text:p text:style-name="P2">47533 Kleve</text:p>
      <text:p text:style-name="P1"/>
      <text:p text:style-name="P1"/>
      <text:p text:style-name="Standard"><text:span text:style-name="T1"><text:tab/><text:tab/><text:tab/><text:tab/><text:tab/><text:tab/><text:tab/><text:tab/>Kleve-Donsbrüggen, </text:span><text:span text:style-name="T4">23.</text:span><text:span text:style-name="T5">06.</text:span><text:span text:style-name="T1">201</text:span><text:span text:style-name="T4">8</text:span></text:p>
      <text:p text:style-name="P1"/>
      <text:p text:style-name="P1"/>
      <text:p text:style-name="P6">Mieterhöhung bis zu ortsüblichen Vergleichsmieter gemäß BGB $558, $558a, $558b, $558c und $558d durch neuesten Mietspiegel</text:p>
      <text:p text:style-name="P1"/>
      <text:p text:style-name="P1"/>
      <text:p text:style-name="Standard"><text:span text:style-name="T2">Sehr geehrte <text:s/></text:span><text:span text:style-name="T3">Frau Eichmann</text:span><text:span text:style-name="T2">,</text:span></text:p>
      <text:p text:style-name="P1"/>
      <text:p text:style-name="P1"/>
      <text:p text:style-name="Standard"><text:span text:style-name="T1">Wie Sie wissen, betragt die Netto Miete für die Wohnung </text:span><text:span text:style-name="T8">€</text:span> <text:span text:style-name="T7">305</text:span><text:span text:style-name="T1">. Bei </text:span><text:span text:style-name="T4">38,6</text:span><text:span text:style-name="T1"> </text:span><text:span text:style-name="T9"><text:s/></text:span><text:span text:style-name="T12">m²</text:span><text:span text:style-name="T1"> <text:s/>isst dies ein Quadratmeter-Preis von </text:span><text:span text:style-name="T9">€</text:span><text:span text:style-name="T1"> </text:span><text:span text:style-name="T5">6</text:span><text:span text:style-name="T1">,</text:span><text:span text:style-name="T5">47</text:span></text:p>
      <text:p text:style-name="P1"/>
      <text:p text:style-name="P5"><text:span text:style-name="T5">Wir haben die letzte 6 Jahren keine Mieterhöhung durchgef</text:span><text:span text:style-name="T13">ü</text:span><text:span text:style-name="T14">hrt.</text:span></text:p>
      <text:p text:style-name="P4"/>
      <text:p text:style-name="Standard"><text:span text:style-name="T1">Ich bitte Sie daher, der Erhöhung Ihrer Netto Miete auf </text:span><text:span text:style-name="T9">€</text:span><text:span text:style-name="T1"> </text:span><text:span text:style-name="T7">355</text:span><text:span text:style-name="T5"> ,</text:span><text:span text:style-name="T1"> dies entspricht einem <text:s/>Quadratmeter-Preis von </text:span><text:span text:style-name="T8">€</text:span> <text:span text:style-name="T15">8,33</text:span> ,<text:span text:style-name="T1">schriftlich bis zum 1.</text:span><text:span text:style-name="T5">9</text:span><text:span text:style-name="T1">.201</text:span><text:span text:style-name="T5">8</text:span><text:span text:style-name="T1"> zuzustimmen.</text:span></text:p>
      <text:p text:style-name="P1"/>
      <text:p text:style-name="P5"><text:span text:style-name="T1">Der veränderten </text:span><text:span text:style-name="T5"><text:s/></text:span><text:span text:style-name="T1">Mietbetrag </text:span><text:span text:style-name="T9">€ </text:span><text:span text:style-name="T10">4</text:span><text:span text:style-name="T11">3</text:span><text:span text:style-name="T10">5 </text:span><text:span text:style-name="T5"><text:s/>(inkl.), </text:span><text:span text:style-name="T1">zahlen Sie bitte ab dem 1.1</text:span><text:span text:style-name="T5">0</text:span><text:span text:style-name="T1">.201</text:span><text:span text:style-name="T5">8</text:span><text:span text:style-name="T1">.</text:span></text:p>
      <text:p text:style-name="P4"/>
      <text:p text:style-name="P1"/>
      <text:p text:style-name="P1">Mit freundliche Grüßen,</text:p>
      <text:p text:style-name="P1"/>
      <text:p text:style-name="P1"/>
      <text:p text:style-name="P1"/>
      <text:p text:style-name="P1">Herbrand und Oksana Hofk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arial, helvetica, 'droid sans', sans-serif"/>
    <style:font-face style:name="sans-serif" svg:font-family="sans-serif, Ari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50:11.080000000</meta:creation-date>
    <meta:print-date>2018-06-23T06:21:19.185000000</meta:print-date>
    <meta:editing-duration>P11DT12H30M30S</meta:editing-duration>
    <dc:date>2018-11-16T11:52:39.361000000</dc:date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7" meta:word-count="116" meta:character-count="820" meta:non-whitespace-character-count="676"/>
  </office:meta>
</office:document-meta>
</file>