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139097" officeooo:paragraph-rsid="00139097"/>
    </style:style>
    <style:style style:name="P3" style:family="paragraph" style:parent-style-name="Standard">
      <style:text-properties style:font-name="Times New Roman" fo:font-size="18pt" fo:language="de" fo:country="DE" style:font-size-asian="18pt" style:font-size-complex="18pt"/>
    </style:style>
    <style:style style:name="P4" style:family="paragraph" style:parent-style-name="Standard">
      <style:text-properties fo:color="#000000" style:font-name="Times New Roman" fo:font-size="18pt" fo:language="de" fo:country="DE" fo:font-weight="bold" officeooo:rsid="00139097" officeooo:paragraph-rsid="00139097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style:font-name="Times New Roman" fo:font-size="18pt" fo:language="de" fo:country="DE" fo:font-weight="bold" officeooo:paragraph-rsid="00139097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style:font-name="Times New Roman" fo:font-size="18pt" fo:language="de" fo:country="DE" fo:font-weight="bold" officeooo:rsid="00151466" officeooo:paragraph-rsid="00151466" style:font-size-asian="18pt" style:font-weight-asian="bold" style:font-size-complex="18pt" style:font-weight-complex="bold"/>
    </style:style>
    <style:style style:name="P7" style:family="paragraph" style:parent-style-name="Standard" style:master-page-name="Standard">
      <style:paragraph-properties style:page-number="auto"/>
      <style:text-properties fo:language="de" fo:country="DE"/>
    </style:style>
    <style:style style:name="P8" style:family="paragraph" style:parent-style-name="Standard">
      <style:text-properties fo:language="de" fo:country="DE" officeooo:rsid="00139097" officeooo:paragraph-rsid="001836ec"/>
    </style:style>
    <style:style style:name="P9" style:family="paragraph" style:parent-style-name="Standard">
      <style:text-properties fo:language="de" fo:country="DE" officeooo:rsid="001836ec" officeooo:paragraph-rsid="001836ec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fc0d8"/>
    </style:style>
    <style:style style:name="T3" style:family="text">
      <style:text-properties fo:language="de" fo:country="DE" officeooo:rsid="00109cd7"/>
    </style:style>
    <style:style style:name="T4" style:family="text">
      <style:text-properties fo:language="de" fo:country="DE" officeooo:rsid="00139097"/>
    </style:style>
    <style:style style:name="T5" style:family="text">
      <style:text-properties fo:language="de" fo:country="DE" officeooo:rsid="00167b75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officeooo:rsid="001836ec"/>
    </style:style>
    <style:style style:name="T8" style:family="text">
      <style:text-properties officeooo:rsid="0018f9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/>
      <text:p text:style-name="P1"><text:tab/><text:tab/><text:tab/><text:tab/><text:tab/><text:tab/>Herbrand und Oksana Hofker</text:p>
      <text:p text:style-name="P1"><text:tab/><text:tab/><text:tab/><text:tab/><text:tab/><text:tab/>Hauptstraße 25</text:p>
      <text:p text:style-name="P1"><text:tab/><text:tab/><text:tab/><text:tab/><text:tab/><text:tab/>47533 Kleve Donsbrüggen</text:p>
      <text:p text:style-name="Standard"><text:span text:style-name="T1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1">herbrand.hofker@gmail.com</text:span></text:span></text:a></text:p>
      <text:p text:style-name="P1"><text:tab/><text:tab/><text:tab/><text:tab/><text:tab/><text:tab/><text:tab/></text:p>
      <text:p text:style-name="P1"/>
      <text:p text:style-name="P4"><text:s text:c="2"/>Herr Lampe</text:p>
      <text:p text:style-name="P5"><text:span text:style-name="T6"><text:s text:c="2"/>Lindenallee 33</text:span><text:line-break/> <text:s/><text:span text:style-name="T6">47533 Kleve</text:span> </text:p>
      <text:p text:style-name="P6"><text:s text:c="2"/>Deutschland</text:p>
      <text:p text:style-name="P3"/>
      <text:p text:style-name="P1"/>
      <text:p text:style-name="Standard"><text:span text:style-name="T1"><text:tab/><text:tab/><text:tab/><text:tab/><text:tab/><text:tab/><text:tab/><text:tab/>Kleve-Donsbrüggen, </text:span><text:span text:style-name="T5">15</text:span><text:span text:style-name="T2">.</text:span><text:span text:style-name="T4">1</text:span><text:span text:style-name="T5">1</text:span><text:span text:style-name="T3">.</text:span><text:span text:style-name="T1">201</text:span><text:span text:style-name="T2">8</text:span></text:p>
      <text:p text:style-name="P1"/>
      <text:p text:style-name="P1"/>
      <text:p text:style-name="P1"/>
      <text:p text:style-name="P1"/>
      <text:p text:style-name="P2">Sehr geehrte Herr Lampe,</text:p>
      <text:p text:style-name="P2"/>
      <text:p text:style-name="P1"/>
      <text:p text:style-name="P8">Wir haben <text:span text:style-name="T7">keine Antwort von Ihnen bekommen aber horten erst diese Woche von Frau Eichmann</text:span></text:p>
      <text:p text:style-name="P8"><text:span text:style-name="T7">das Sie eine Mieterhöhung von Max 20%.</text:span></text:p>
      <text:p text:style-name="P8"/>
      <text:p text:style-name="P9">Aber die Mieterhöhung isst nur 17,54%.! </text:p>
      <text:p text:style-name="P9">Die Mieter war letzte Jahre 285 Euro und wird jetzt 335 Euro.</text:p>
      <text:p text:style-name="P9">Mit 100 Euro Nebenkosten wird das 435 Euro.</text:p>
      <text:p text:style-name="P9">Entschuldigung das Ich die alte kalte Miete nicht richtig hat <text:span text:style-name="T8">in die letzte Briefe</text:span></text:p>
      <text:p text:style-name="P9">Ich hoffe das das noch bezahlt werd über Oktober und November, denn wir haben auch viele Kosten.</text:p>
      <text:p text:style-name="P2"/>
      <text:p text:style-name="P1">Mit freundliche Grüßen,</text:p>
      <text:p text:style-name="P1"/>
      <text:p text:style-name="P1"/>
      <text:p text:style-name="P1"/>
      <text:p text:style-name="P1">Herbrand und Oksana Hofker</text:p>
      <text:p text:style-name="P2">Oudaen 26</text:p>
      <text:p text:style-name="P2">8219 AB Lelystad</text:p>
      <text:p text:style-name="P2">Niederlande</text:p>
      <text:p text:style-name="P2">Email : herbrand.hofker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50:11.080000000</meta:creation-date>
    <meta:print-date>2018-11-16T12:10:51.127000000</meta:print-date>
    <meta:editing-duration>P11DT13H15M26S</meta:editing-duration>
    <dc:date>2018-11-16T12:11:03.800000000</dc:date>
    <meta:editing-cycles>7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23" meta:word-count="120" meta:character-count="811" meta:non-whitespace-character-count="664"/>
  </office:meta>
</office:document-meta>
</file>