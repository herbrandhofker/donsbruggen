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2"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style>
    <style:style style:name="P3"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4"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5"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6"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7"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8"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9"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style>
    <style:style style:name="P10"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style>
    <style:style style:name="P11"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officeooo:paragraph-rsid="000801bf"/>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style>
    <style:style style:name="P13"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officeooo:paragraph-rsid="000a178a"/>
    </style:style>
    <style:style style:name="P1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1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16"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17"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officeooo:paragraph-rsid="001625c6"/>
    </style:style>
    <style:style style:name="P18"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19"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0"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1"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2"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3"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officeooo:paragraph-rsid="001625c6" style:font-name-asian="Times New Roman1" style:font-size-asian="10pt" style:language-asian="de" style:country-asian="DE" style:font-name-complex="Times New Roman1" style:font-size-complex="10pt"/>
    </style:style>
    <style:style style:name="P24"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25"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26"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27"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officeooo:paragraph-rsid="001937c6"/>
    </style:style>
    <style:style style:name="P28"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9"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officeooo:rsid="00047fe5" officeooo:paragraph-rsid="000c18d5" style:font-name-asian="Times New Roman1" style:font-size-asian="10pt" style:language-asian="de" style:country-asian="DE" style:font-name-complex="Times New Roman1" style:font-size-complex="10pt"/>
    </style:style>
    <style:style style:name="P30"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1"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2"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3"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34"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officeooo:paragraph-rsid="00047fe5" style:font-size-asian="10pt" style:font-size-complex="10pt"/>
    </style:style>
    <style:style style:name="P35" style:family="paragraph" style:parent-style-name="Stand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style>
    <style:style style:name="P36"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7" style:family="paragraph" style:parent-style-name="Stand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38" style:family="paragraph" style:parent-style-name="Standard">
      <style:paragraph-properties fo:margin-left="0.751cm" fo:margin-right="0cm" fo:margin-top="0cm" fo:margin-bottom="0cm" loext:contextual-spacing="false" style:line-height-at-least="0.176cm" fo:text-align="justify" style:justify-single-word="false" fo:text-indent="-0.751cm" style:auto-text-indent="false"/>
    </style:style>
    <style:style style:name="P39" style:family="paragraph" style:parent-style-name="Stand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0" style:family="paragraph" style:parent-style-name="Text_20_body">
      <style:paragraph-properties>
        <style:tab-stops>
          <style:tab-stop style:position="0cm"/>
          <style:tab-stop style:position="1.251cm"/>
          <style:tab-stop style:position="3.251cm"/>
        </style:tab-stops>
      </style:paragraph-properties>
      <style:text-properties style:font-name="Times New Roman" fo:font-size="10pt" style:font-size-asian="10pt"/>
    </style:style>
    <style:style style:name="P41" style:family="paragraph" style:parent-style-name="Stand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2"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ab-stops>
          <style:tab-stop style:position="4.253cm"/>
          <style:tab-stop style:position="5.002cm"/>
          <style:tab-stop style:position="7.003cm"/>
        </style:tab-stops>
      </style:paragraph-properties>
      <style:text-properties officeooo:rsid="00180951"/>
    </style:style>
    <style:style style:name="P43"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44"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5" style:family="paragraph" style:parent-style-name="Standard" style:master-page-name="Standard">
      <style:paragraph-properties fo:margin-top="0cm" fo:margin-bottom="0cm" loext:contextual-spacing="false" fo:line-height="150%" fo:text-align="center" style:justify-single-word="false" style:page-number="auto"/>
    </style:style>
    <style:style style:name="P46" style:family="paragraph" style:parent-style-name="Standard" style:list-style-name="WW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T1" style:family="text">
      <style:text-properties style:font-name="Times New Roman"/>
    </style:style>
    <style:style style:name="T2" style:family="text">
      <style:text-properties style:font-name="Times New Roman" fo:font-size="14pt" fo:font-weight="bold" style:font-name-asian="Times New Roman1" style:font-size-asian="14pt" style:language-asian="de" style:country-asian="DE" style:font-weight-asian="bold" style:font-name-complex="Times New Roman1" style:font-size-complex="14pt"/>
    </style:style>
    <style:style style:name="T3" style:family="text">
      <style:text-properties style:font-name="Times New Roman" fo:font-size="14pt" fo:font-weight="bold" officeooo:rsid="000331fe" style:font-name-asian="Times New Roman1" style:font-size-asian="14pt" style:language-asian="de" style:country-asian="DE" style:font-weight-asian="bold" style:font-name-complex="Times New Roman1" style:font-size-complex="14pt"/>
    </style:style>
    <style:style style:name="T4" style:family="text">
      <style:text-properties style:font-name="Times New Roman" fo:font-size="10pt" style:font-name-asian="Times New Roman1" style:font-size-asian="10pt" style:language-asian="de" style:country-asian="DE" style:font-name-complex="Times New Roman1" style:font-size-complex="10pt"/>
    </style:style>
    <style:style style:name="T5" style:family="text">
      <style:text-properties style:font-name="Times New Roman" fo:font-size="10pt" officeooo:rsid="00047fe5" style:font-name-asian="Times New Roman1" style:font-size-asian="10pt" style:language-asian="de" style:country-asian="DE" style:font-name-complex="Times New Roman1" style:font-size-complex="10pt"/>
    </style:style>
    <style:style style:name="T6" style:family="text">
      <style:text-properties style:font-name="Times New Roman" fo:font-size="10pt" officeooo:rsid="000801bf" style:font-name-asian="Times New Roman1" style:font-size-asian="10pt" style:language-asian="de" style:country-asian="DE" style:font-name-complex="Times New Roman1" style:font-size-complex="10pt"/>
    </style:style>
    <style:style style:name="T7" style:family="text">
      <style:text-properties style:font-name="Times New Roman" fo:font-size="10pt" officeooo:rsid="000d3369" style:font-name-asian="Times New Roman1" style:font-size-asian="10pt" style:language-asian="de" style:country-asian="DE" style:font-name-complex="Times New Roman1" style:font-size-complex="10pt"/>
    </style:style>
    <style:style style:name="T8" style:family="text">
      <style:text-properties style:font-name="Times New Roman" fo:font-size="10pt" officeooo:rsid="00102ba1" style:font-name-asian="Times New Roman1" style:font-size-asian="10pt" style:language-asian="de" style:country-asian="DE" style:font-name-complex="Times New Roman1" style:font-size-complex="10pt"/>
    </style:style>
    <style:style style:name="T9" style:family="text">
      <style:text-properties style:font-name="Times New Roman" fo:font-size="10pt" officeooo:rsid="0011dd8a" style:font-name-asian="Times New Roman1" style:font-size-asian="10pt" style:language-asian="de" style:country-asian="DE" style:font-name-complex="Times New Roman1" style:font-size-complex="10pt"/>
    </style:style>
    <style:style style:name="T10" style:family="text">
      <style:text-properties style:font-name="Times New Roman" fo:font-size="10pt" officeooo:rsid="00136c5e" style:font-name-asian="Times New Roman1" style:font-size-asian="10pt" style:language-asian="de" style:country-asian="DE" style:font-name-complex="Times New Roman1" style:font-size-complex="10pt"/>
    </style:style>
    <style:style style:name="T11" style:family="text">
      <style:text-properties style:font-name="Times New Roman" fo:font-size="10pt" officeooo:rsid="001625c6" style:font-name-asian="Times New Roman1" style:font-size-asian="10pt" style:language-asian="de" style:country-asian="DE" style:font-name-complex="Times New Roman1" style:font-size-complex="10pt"/>
    </style:style>
    <style:style style:name="T12" style:family="text">
      <style:text-properties style:font-name="Times New Roman" fo:font-size="10pt" officeooo:rsid="00180951" style:font-name-asian="Times New Roman1" style:font-size-asian="10pt" style:language-asian="de" style:country-asian="DE" style:font-name-complex="Times New Roman1" style:font-size-complex="10pt"/>
    </style:style>
    <style:style style:name="T13" style:family="text">
      <style:text-properties style:font-name="Times New Roman" fo:font-size="10pt" officeooo:rsid="001937c6" style:font-name-asian="Times New Roman1" style:font-size-asian="10pt" style:language-asian="de" style:country-asian="DE" style:font-name-complex="Times New Roman1" style:font-size-complex="10pt"/>
    </style:style>
    <style:style style:name="T14" style:family="text">
      <style:text-properties style:font-name="Times New Roman" fo:font-size="10pt" officeooo:rsid="001d33b8" style:font-name-asian="Times New Roman1" style:font-size-asian="10pt" style:language-asian="de" style:country-asian="DE" style:font-name-complex="Times New Roman1" style:font-size-complex="10pt"/>
    </style:style>
    <style:style style:name="T15" style:family="text">
      <style:text-properties style:font-name="Times New Roman" fo:font-size="10pt" officeooo:rsid="001e73db" style:font-name-asian="Times New Roman1" style:font-size-asian="10pt" style:language-asian="de" style:country-asian="DE" style:font-name-complex="Times New Roman1" style:font-size-complex="10pt"/>
    </style:style>
    <style:style style:name="T16" style:family="text">
      <style:text-properties style:font-name="Times New Roman" fo:font-size="10pt" officeooo:rsid="001e95be" style:font-name-asian="Times New Roman1" style:font-size-asian="10pt" style:language-asian="de" style:country-asian="DE" style:font-name-complex="Times New Roman1" style:font-size-complex="10pt"/>
    </style:style>
    <style:style style:name="T17" style:family="text">
      <style:text-properties style:font-name="Times New Roman" fo:font-size="10pt" officeooo:rsid="001fd784" style:font-name-asian="Times New Roman1" style:font-size-asian="10pt" style:language-asian="de" style:country-asian="DE" style:font-name-complex="Times New Roman1" style:font-size-complex="10pt"/>
    </style:style>
    <style:style style:name="T18" style:family="text">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T19" style:family="text">
      <style:text-properties style:font-name="Times New Roman" style:font-name-asian="Times New Roman1" style:language-asian="de" style:country-asian="DE" style:font-name-complex="Times New Roman1"/>
    </style:style>
    <style:style style:name="T20" style:family="text">
      <style:text-properties fo:font-variant="normal" fo:text-transform="none" fo:color="#222222" style:font-name="Times New Roman" fo:font-size="10pt" fo:letter-spacing="normal" fo:font-style="normal" fo:font-weight="normal" style:font-size-asian="10pt" style:font-size-complex="10pt"/>
    </style:style>
    <style:style style:name="T21" style:family="text">
      <style:text-properties fo:font-variant="normal" fo:text-transform="none" fo:color="#222222" style:font-name="Times New Roman" fo:font-size="10pt" fo:letter-spacing="normal" fo:font-style="normal" fo:font-weight="normal" officeooo:rsid="000cad48" style:font-size-asian="10pt" style:font-size-complex="10pt"/>
    </style:style>
    <style:style style:name="T22" style:family="text">
      <style:text-properties style:font-name-asian="Times New Roman1" style:language-asian="de" style:country-asian="DE" style:font-name-complex="Times New Roman1"/>
    </style:style>
    <style:style style:name="T23" style:family="text">
      <style:text-properties officeooo:rsid="0011dd8a" style:font-name-asian="Times New Roman1" style:language-asian="de" style:country-asian="DE" style:font-name-complex="Times New Roman1"/>
    </style:style>
    <style:style style:name="T24" style:family="text">
      <style:text-properties officeooo:rsid="001937c6" style:font-name-asian="Times New Roman1" style:language-asian="de" style:country-asian="DE" style:font-name-complex="Times New Roman1"/>
    </style:style>
    <style:style style:name="T25" style:family="text">
      <style:text-properties officeooo:rsid="001d33b8" style:font-name-asian="Times New Roman1" style:language-asian="de" style:country-asian="DE" style:font-name-complex="Times New Roman1"/>
    </style:style>
    <style:style style:name="T26" style:family="text">
      <style:text-properties officeooo:rsid="0011dd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3">Zimmer</text:span><text:span text:style-name="T2">-Mietvertrag <text:s text:c="3"/></text:span></text:p>
      <text:p text:style-name="P41">DieVermieter<text:tab/>Herbrand und Oksana Hofker<text:tab/><text:span text:style-name="T1"><text:tab/><text:tab/></text:span></text:p>
      <text:p text:style-name="P28">wohnhaft in<text:tab/>Kleve, Hauptstrasse25</text:p>
      <text:p text:style-name="P34"><text:span text:style-name="T22">und der (die Mieter)<text:tab/></text:span><text:span text:style-name="T24">Vinay</text:span><text:span text:style-name="T23"> </text:span><text:span text:style-name="T24">Raghavendra </text:span><text:span text:style-name="T25">Rao</text:span></text:p>
      <text:p text:style-name="P33"><text:tab/></text:p>
      <text:p text:style-name="P28">schließen folgenden Mietvertrag:</text:p>
      <text:p text:style-name="P24"/>
      <text:p text:style-name="P30">§ 1 Mieträume</text:p>
      <text:p text:style-name="P24"/>
      <text:p text:style-name="P19">1. <text:tab/>Im Hause</text:p>
      <text:p text:style-name="P19"><text:tab/>KLEVE, Hauptstrasse 25 , <text:span text:style-name="T26">E</text:span>G</text:p>
      <text:p text:style-name="P19"><text:tab/>werden folgende Räume vermietet:</text:p>
      <text:p text:style-name="P11"><text:span text:style-name="T4"><text:tab/></text:span><text:span text:style-name="T5">1</text:span><text:span text:style-name="T4"> Zimmer, 1 </text:span><text:span text:style-name="T6">gemeinsame </text:span><text:span text:style-name="T5">Etage Dusche/</text:span><text:span text:style-name="T4">WC, <text:s/>1 </text:span><text:span text:style-name="T6">gemeinsame</text:span><text:span text:style-name="T4"> Kellerräume</text:span></text:p>
      <text:p text:style-name="P19">2.<text:tab/>Dem Mieter werden vom Vermieter für die Mietzeit ausgehändigt:</text:p>
      <text:p text:style-name="P10"><text:span text:style-name="T4"><text:tab/> </text:span><text:span text:style-name="T5">1</text:span><text:span text:style-name="T4"> </text:span><text:span text:style-name="T5">Zimmer</text:span><text:span text:style-name="T4">-Schlüssel., </text:span><text:span text:style-name="T5">1</text:span><text:span text:style-name="T4"> Wohnungs-Schlüsse</text:span><text:span text:style-name="T8">l</text:span><text:span text:style-name="T4">.</text:span></text:p>
      <text:p text:style-name="P10"><text:span text:style-name="T4">3. <text:s/>Die Wohnfläche beträgt <text:s/></text:span><text:span text:style-name="T10">+/-</text:span><text:span text:style-name="T5">20 </text:span><text:span text:style-name="T4">qm.</text:span></text:p>
      <text:p text:style-name="P19">4. <text:s/>Die Wohnung ist eine Eigentumswohnung. <text:s/></text:p>
      <text:p text:style-name="P25"/>
      <text:p text:style-name="P25"/>
      <text:p text:style-name="P31">§ 2 Mietzeit</text:p>
      <text:p text:style-name="P25"/>
      <text:p text:style-name="P35"><text:span text:style-name="T4">Das Mietverhältnis beginnt am: </text:span><text:span text:style-name="T13">1</text:span><text:span text:style-name="T12"> </text:span><text:span text:style-name="T13">Marz</text:span><text:span text:style-name="T4"> </text:span><text:span text:style-name="T13">2016</text:span><text:span text:style-name="T4">, es läuft auf unbestimmte Zeit, </text:span><text:span text:style-name="T10">aber mindestens </text:span><text:span text:style-name="T13">4</text:span><text:span text:style-name="T10"> Monate</text:span><text:span text:style-name="T4">.</text:span></text:p>
      <text:p text:style-name="P25"/>
      <text:p text:style-name="P31">§ 3 Miete</text:p>
      <text:p text:style-name="P25"/>
      <text:p text:style-name="P10"><text:span text:style-name="T4">1.<text:tab/>Die Miete beträgt monatlich: </text:span><text:span text:style-name="T13">230</text:span><text:span text:style-name="T4"> Euro.</text:span></text:p>
      <text:p text:style-name="P10"><text:span text:style-name="T4"><text:tab/>in Worten: </text:span><text:span text:style-name="T5">zwei</text:span><text:span text:style-name="T4">hundert </text:span><text:span text:style-name="T15">dreizig</text:span><text:span text:style-name="T4"> Euro.</text:span></text:p>
      <text:p text:style-name="P20"><text:tab/>Mieterhöhungen und alle anderen Erklärungen, die Vertragsänderungen betreffen, muss der Vermieter schriftlich abgeben. Soweit gesetzlich zulässig, reicht die Abgabe der Erklärung in Textform aus.</text:p>
      <text:p text:style-name="P14"/>
      <text:p text:style-name="P14"/>
      <text:p text:style-name="P21">2.<text:tab/>Zusätzlich zur Miete bezahlt der Mieter</text:p>
      <text:p text:style-name="P21"><text:tab/></text:p>
      <text:p text:style-name="P12"><text:span text:style-name="T4"><text:tab/>für Heizung und Warmwasser,Wasserversorgung, Entwässerung, Müllabfuhr, Grundsteuer, Gartenpflege, <text:s/>Hausmeister, Straßenreinigung, </text:span><text:span text:style-name="T5">S</text:span><text:span text:style-name="T4">trom <text:s text:c="2"/>eine </text:span><text:span text:style-name="T9">feste Z</text:span><text:span text:style-name="T4">ahlung in Höhe von <text:s/></text:span><text:span text:style-name="T13">30</text:span><text:span text:style-name="T4"> Euro monatlich. </text:span><text:span text:style-name="T13">(In Monate November ,Dezember, Januar , Februar 30 Euro fuer Heizung extra)</text:span></text:p>
      <text:p text:style-name="P18"/>
      <text:p text:style-name="P13"><text:span text:style-name="T4">3.<text:tab/>Der Gesamtbetrag der Miete in Höhe von monatlich <text:s/></text:span><text:span text:style-name="T13">260</text:span><text:span text:style-name="T4"> Euro ist auf das </text:span><text:span text:style-name="T7">(IBAN) </text:span><text:span text:style-name="T4">Konto </text:span><text:span text:style-name="T20">NL53ABNA0608911674, </text:span><text:span text:style-name="T21">Name Hofker,</text:span><text:span text:style-name="T20"> </text:span><text:span text:style-name="T4">des Vermieters zu zahlen. </text:span><text:span text:style-name="T7">(Bic/Swift ABNANL2A)</text:span></text:p>
      <text:p text:style-name="P3"/>
      <text:p text:style-name="P3"/>
      <text:p text:style-name="P6">§ 4 Verteilung und Abrechnung der Heiz- und Betriebskosten</text:p>
      <text:p text:style-name="P3"/>
      <text:p text:style-name="P15"/>
      <text:p text:style-name="P26"/>
      <text:p text:style-name="P7">§ 5 Mängel und Schäden an der Wohnung</text:p>
      <text:p text:style-name="P4"/>
      <text:p text:style-name="P22"><text:soft-page-break/>1.<text:tab/>Zeigt sich in der Wohnung ein Mangel, so muss dies der Mieter dem Vermieter unverzüglich mitteilen.</text:p>
      <text:p text:style-name="P37"/>
      <text:p text:style-name="P22">2.<text:tab/>Der Mieter haftet dem Vermieter für Schäden, die er selbst, seine Mitbewohner, Hausgehilfen, Untermieter sowie von ihm beauftragte Handwerker nach dem Einzug schuldhaft verursacht haben.</text:p>
      <text:p text:style-name="P16"/>
      <text:p text:style-name="P4"/>
      <text:p text:style-name="P38"><text:span text:style-name="T18">§ 6 <text:tab/></text:span><text:bookmark-start text:name="_GoBack"/><text:span text:style-name="T18">Schönheitsreparaturen</text:span></text:p>
      <text:p text:style-name="P39"/>
      <text:list xml:id="list3744245294491238475" text:style-name="WWNum2">
        <text:list-item>
          <text:p text:style-name="P43"><text:span text:style-name="T4">Die Schönheitsreparaturen übernimmt der Mieter. Hierzu gehören das </text:span><text:span text:style-name="T19">Tapezieren, Streichen, Kalken der Wände und Decken, das </text:span><text:span text:style-name="T4">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44">Die Schönheitsreparaturen sind durchzuführen, wenn die Abnutzung es erfordert, im Allgemeinen in den Nassräumen alle drei Jahre, sonst alle fünf Jahre.</text:p>
        </text:list-item>
      </text:list>
      <text:p text:style-name="P4"><text:bookmark-end text:name="_GoBack"/></text:p>
      <text:p text:style-name="P7">§ 7 Ausbesserungen und bauliche Veränderungen</text:p>
      <text:p text:style-name="P4"/>
      <text:list xml:id="list4152886179258049312" text:style-name="WWNum1">
        <text:list-item>
          <text:p text:style-name="P46">Der Mieter hat Maßnahmen in der Wohnung oder im Haus zu dulden, die erforderlich sind, um sie oder das Gebäude zu erhalten (Instandsetzungs- und Instandhaltungsmaßnahmen).</text:p>
        </text:list-item>
      </text:list>
      <text:p text:style-name="P5"/>
      <text:list xml:id="list173357896642764" text:continue-numbering="true" text:style-name="WWNum1">
        <text:list-item>
          <text:p text:style-name="P46">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5"/>
      <text:p text:style-name="P4"/>
      <text:p text:style-name="P2">§ 8 Nutzung der Mieträume, Untervermietung</text:p>
      <text:p text:style-name="P1"/>
      <text:p text:style-name="P9">1.<text:tab/>Der Mieter kann jederzeit Ehegatten, Familienangehörige oder Lebenspartner, die mit dem Mieter einen auf Dauer angelegten gemeinsamen Haushalt führen wollen, in die Wohnung aufnehmen, wenn diese dadurch nicht überbelegt wird. </text:p>
      <text:p text:style-name="P8"/>
      <text:p text:style-name="P9">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p>
      <text:p text:style-name="P8"/>
      <text:p text:style-name="P9">3.<text:tab/>Eine Berufsausübung in der Wohnung ist dann genehmigungspflichtig, wenn hierdurch erhebliche Interessen der Nachbarn oder des Vermieters berührt werden. Telearbeit und nicht störende Betätigungen sind ohne Genehmigung zulässig.</text:p>
      <text:p text:style-name="P8"/>
      <text:p text:style-name="P1"/>
      <text:p text:style-name="P36"><text:tab/>§ 9 Tierhaltung</text:p>
      <text:p text:style-name="P16"/>
      <text:p text:style-name="P22">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16"/>
      <text:p text:style-name="P22">2.<text:tab/>Der Vermieter kann der Tierhaltung widersprechen, wenn durch die Tierhaltung die Hausgemeinschaft belästigt wird.</text:p>
      <text:p text:style-name="P4"/>
      <text:p text:style-name="P4"/>
      <text:p text:style-name="P7">§ 10 Gartennutzung</text:p>
      <text:p text:style-name="P4"/>
      <text:p text:style-name="P22">1.<text:tab/>Der Mieter darf den zum Haus gehörenden Garten nutzen.</text:p>
      <text:p text:style-name="P16"/>
      <text:p text:style-name="P22">2.<text:tab/>Die Pflege des Gartens übernimmt der <text:s/>Vermieter.</text:p>
      <text:p text:style-name="P4"><text:soft-page-break/></text:p>
      <text:p text:style-name="P4"/>
      <text:p text:style-name="P7">§ 11 Fernseh- und Rundfunkempfang</text:p>
      <text:p text:style-name="P4"/>
      <text:p text:style-name="P22">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4"/>
      <text:p text:style-name="P4"/>
      <text:p text:style-name="P32">§ 12 Betreten der Mieträume durch den Vermieter</text:p>
      <text:p text:style-name="P4"/>
      <text:p text:style-name="P22">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16"/>
      <text:p text:style-name="P22">2.<text:tab/>Damit der Vermieter im Notfall auch bei längerer Abwesenheit des Mieters Zugang zur Wohnung hat, muss dieser dem Vermieter mitteilen, wem er zu diesem Zweck einen Wohnungsschlüssel überlassen hat.</text:p>
      <text:p text:style-name="P1"/>
      <text:p text:style-name="P2">§ 13 Auszug des Mieters</text:p>
      <text:p text:style-name="P1"/>
      <text:p text:style-name="P40">Zieht der Mieter aus, muss er die Räume besenrein und mit sämtlichen Schlüsseln dem Vermieter oder seinem Verwalter zurückgeben.</text:p>
      <text:p text:style-name="P1"/>
      <text:p text:style-name="P7">§ 21 Mehrere Mieter</text:p>
      <text:p text:style-name="P4"/>
      <text:p text:style-name="P22">1.<text:tab/>Mehrere Mieter haften für alle Verpflichtungen aus dem Mietverhältnis als Gesamtschuldner.</text:p>
      <text:p text:style-name="P16"/>
      <text:p text:style-name="P22">2.<text:tab/>Kündigungen, Mieterhöhungen sowie andere Erklärungen mit dem Ziel, eine Vertragsänderung herbei zu führen, müssen von oder gegenüber allen Mietern abgegeben werden.</text:p>
      <text:p text:style-name="P16"/>
      <text:p text:style-name="P7">§ 22 Sonstige Vereinbarungen</text:p>
      <text:p text:style-name="P4"/>
      <text:p text:style-name="P23">1.<text:tab/>Die Hausordnung ist Bestandteil dieses Vertrages, wenn sie ihm beigefügt ist. Wesentliche Verpflichtungen des Mietvertrages können hierdurch nicht abgeändert oder ergänzt werden</text:p>
      <text:p text:style-name="P23"/>
      <text:p text:style-name="P17"><text:span text:style-name="T11">2.<text:tab/></text:span><text:span text:style-name="T4">Mieter und Vermieter vereinbaren als Sicherheit eine Mietkaution in Höhe von </text:span><text:span text:style-name="T15">2</text:span><text:span text:style-name="T16">0</text:span><text:span text:style-name="T15">0</text:span><text:span text:style-name="T4"> Euro, zu bezahlen bei Anfang von die Miete.</text:span></text:p>
      <text:p text:style-name="P42"/>
      <text:p text:style-name="P26"/>
      <text:p text:style-name="P26"><text:span text:style-name="T4"><text:tab/>Kleve Montag, den </text:span><text:span text:style-name="T17">29</text:span><text:span text:style-name="T5"> </text:span><text:span text:style-name="T13">Februar</text:span><text:span text:style-name="T8"> </text:span><text:span text:style-name="T4"><text:s/>201</text:span><text:span text:style-name="T13">6</text:span></text:p>
      <text:p text:style-name="P26"/>
      <text:p text:style-name="P26"/>
      <text:p text:style-name="P26"><text:tab/>Vermieter:<text:tab/><text:tab/><text:tab/><text:tab/>Mieter </text:p>
      <text:p text:style-name="P27"><text:span text:style-name="T4"><text:tab/>Herbrand Hofker<text:tab/><text:tab/><text:tab/><text:tab/></text:span><text:span text:style-name="T13">Vinay</text:span><text:span text:style-name="T9"> </text:span><text:span text:style-name="T13">Raghavendra </text:span><text:span text:style-name="T14">Rao</text:span></text:p>
      <text:p text:style-name="P29"/>
      <text:p text:style-name="P2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de" fo:country="DE"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1"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1"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2.773cm" fo:text-indent="-0.635cm" fo:margin-left="2.773cm"/>
        </style:list-level-properties>
        <style:text-properties fo:font-family="Symbol" style:font-style-name="Standaard"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3.408cm" fo:text-indent="-0.635cm" fo:margin-left="3.408cm"/>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4.043cm" fo:text-indent="-0.635cm" fo:margin-left="4.043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4.678cm" fo:text-indent="-0.635cm" fo:margin-left="4.678cm"/>
        </style:list-level-properties>
        <style:text-properties fo:font-family="Symbol" style:font-style-name="Standaard"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5.313cm" fo:text-indent="-0.635cm" fo:margin-left="5.313cm"/>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5.948cm" fo:text-indent="-0.635cm" fo:margin-left="5.94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6.583cm" fo:text-indent="-0.635cm" fo:margin-left="6.583cm"/>
        </style:list-level-properties>
        <style:text-properties fo:font-family="Symbol" style:font-style-name="Standaard"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7.218cm" fo:text-indent="-0.635cm" fo:margin-left="7.218cm"/>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7.853cm" fo:text-indent="-0.635cm" fo:margin-left="7.85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meta:print-date>2015-08-19T08:43:12.571000000</meta:print-date>
    <dc:date>2016-03-01T17:33:56.818000000</dc:date>
    <meta:editing-cycles>27</meta:editing-cycles>
    <meta:editing-duration>PT5H34M36S</meta:editing-duration>
    <meta:generator>LibreOffice/5.1.0.3$Windows_X86_64 LibreOffice_project/5e3e00a007d9b3b6efb6797a8b8e57b51ab1f737</meta:generator>
    <meta:document-statistic meta:table-count="0" meta:image-count="0" meta:object-count="0" meta:page-count="3" meta:paragraph-count="62" meta:word-count="880" meta:character-count="6250" meta:non-whitespace-character-count="5386"/>
    <meta:template xlink:type="simple" xlink:actuate="onRequest" xlink:title="Normal" xlink:href=""/>
  </office:meta>
</office:document-meta>
</file>