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Standaard" style:font-family-generic="roman" style:font-pitch="variable"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style:line-height-at-least="0.176cm" fo:text-align="justify" style:justify-single-word="false">
        <style:tab-stops>
          <style:tab-stop style:position="3.251cm"/>
        </style:tab-stops>
      </style:paragraph-properties>
    </style:style>
    <style:style style:name="P2" style:family="paragraph" style:parent-style-name="Standard">
      <style:paragraph-properties fo:margin-top="0cm" fo:margin-bottom="0cm" loext:contextual-spacing="false" style:line-height-at-least="0.176cm" fo:text-align="justify" style:justify-single-word="false">
        <style:tab-stops>
          <style:tab-stop style:position="0.501cm"/>
          <style:tab-stop style:position="3.251cm"/>
        </style:tab-stops>
      </style:paragraph-properties>
    </style:style>
    <style:style style:name="P3" style:family="paragraph" style:parent-style-name="Standard">
      <style:paragraph-properties fo:margin-top="0cm" fo:margin-bottom="0cm" loext:contextual-spacing="false" style:line-height-at-least="0.176cm" fo:text-align="justify" style:justify-single-word="false">
        <style:tab-stops>
          <style:tab-stop style:position="0.501cm"/>
          <style:tab-stop style:position="1.251cm"/>
          <style:tab-stop style:position="3.251cm"/>
        </style:tab-stops>
      </style:paragraph-properties>
    </style:style>
    <style:style style:name="P4" style:family="paragraph" style:parent-style-name="Standard">
      <style:paragraph-properties fo:margin-top="0cm" fo:margin-bottom="0cm" loext:contextual-spacing="false" style:line-height-at-least="0.176cm" fo:text-align="justify" style:justify-single-word="false">
        <style:tab-stops>
          <style:tab-stop style:position="0.501cm"/>
          <style:tab-stop style:position="1.251cm"/>
          <style:tab-stop style:position="3.251cm"/>
        </style:tab-stops>
      </style:paragraph-properties>
      <style:text-properties officeooo:paragraph-rsid="0016e50d"/>
    </style:style>
    <style:style style:name="P5" style:family="paragraph" style:parent-style-name="Standard">
      <style:paragraph-properties fo:margin-top="0cm" fo:margin-bottom="0cm" loext:contextual-spacing="false" fo:line-height="150%" fo:text-align="justify" style:justify-single-word="false">
        <style:tab-stops>
          <style:tab-stop style:position="3.251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6" style:family="paragraph" style:parent-style-name="Standard">
      <style:paragraph-properties fo:margin-top="0cm" fo:margin-bottom="0cm" loext:contextual-spacing="false" fo:line-height="150%" fo:text-align="justify" style:justify-single-word="false">
        <style:tab-stops>
          <style:tab-stop style:position="3.251cm"/>
        </style:tab-stops>
      </style:paragraph-properties>
      <style:text-properties style:font-name="Times New Roman" fo:font-size="10pt" officeooo:paragraph-rsid="001c91bd" style:font-name-asian="Times New Roman1" style:font-size-asian="10pt" style:language-asian="de" style:country-asian="DE" style:font-name-complex="Times New Roman1" style:font-size-complex="10pt"/>
    </style:style>
    <style:style style:name="P7" style:family="paragraph" style:parent-style-name="Standard">
      <style:paragraph-properties fo:margin-top="0cm" fo:margin-bottom="0cm" loext:contextual-spacing="false" style:line-height-at-least="0.176cm" fo:text-align="justify" style:justify-single-word="false">
        <style:tab-stops>
          <style:tab-stop style:position="3.251cm"/>
        </style:tab-stops>
      </style:paragraph-properties>
      <style:text-properties style:font-name="Times New Roman" fo:font-size="10pt" fo:font-weight="bold" style:font-name-asian="Times New Roman1" style:font-size-asian="10pt" style:language-asian="de" style:country-asian="DE" style:font-weight-asian="bold" style:font-name-complex="Times New Roman1" style:font-size-complex="10pt"/>
    </style:style>
    <style:style style:name="P8" style:family="paragraph" style:parent-style-name="Standard">
      <style:paragraph-properties fo:margin-top="0cm" fo:margin-bottom="0cm" loext:contextual-spacing="false" style:line-height-at-least="0.176cm" fo:text-align="justify" style:justify-single-word="false">
        <style:tab-stops>
          <style:tab-stop style:position="0.501cm"/>
          <style:tab-stop style:position="3.251cm"/>
        </style:tab-stops>
      </style:paragraph-properties>
      <style:text-properties style:font-name="Times New Roman" fo:font-size="10pt" fo:font-weight="bold" style:font-name-asian="Times New Roman1" style:font-size-asian="10pt" style:language-asian="de" style:country-asian="DE" style:font-weight-asian="bold" style:font-name-complex="Times New Roman1" style:font-size-complex="10pt"/>
    </style:style>
    <style:style style:name="P9" style:family="paragraph" style:parent-style-name="Standard">
      <style:paragraph-properties fo:margin-top="0cm" fo:margin-bottom="0cm" loext:contextual-spacing="false" style:line-height-at-least="0.176cm" fo:text-align="justify" style:justify-single-word="false">
        <style:tab-stops>
          <style:tab-stop style:position="0.501cm"/>
          <style:tab-stop style:position="1.251cm"/>
          <style:tab-stop style:position="3.251cm"/>
        </style:tab-stops>
      </style:paragraph-properties>
      <style:text-properties style:font-name="Times New Roman" fo:font-size="10pt" fo:font-weight="bold" style:font-name-asian="Times New Roman1" style:font-size-asian="10pt" style:language-asian="de" style:country-asian="DE" style:font-weight-asian="bold" style:font-name-complex="Times New Roman1" style:font-size-complex="10pt"/>
    </style:style>
    <style:style style:name="P10" style:family="paragraph" style:parent-style-name="Standard">
      <style:paragraph-properties fo:margin-left="3.251cm" fo:margin-right="0cm" fo:margin-top="0cm" fo:margin-bottom="0cm" loext:contextual-spacing="false" fo:line-height="150%" fo:text-align="justify" style:justify-single-word="false" fo:text-indent="-3.251cm" style:auto-text-indent="false">
        <style:tab-stops>
          <style:tab-stop style:position="22.756cm"/>
        </style:tab-stops>
      </style:paragraph-properties>
      <style:text-properties officeooo:paragraph-rsid="0016e50d"/>
    </style:style>
    <style:style style:name="P11" style:family="paragraph" style:parent-style-name="Standard">
      <style:paragraph-properties fo:margin-left="3.251cm" fo:margin-right="0cm" fo:margin-top="0cm" fo:margin-bottom="0cm" loext:contextual-spacing="false" fo:line-height="150%" fo:text-align="justify" style:justify-single-word="false" fo:text-indent="-3.251cm" style:auto-text-indent="false">
        <style:tab-stops>
          <style:tab-stop style:position="22.756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12" style:family="paragraph" style:parent-style-name="Standard">
      <style:paragraph-properties fo:margin-left="1.251cm" fo:margin-right="0cm" fo:margin-top="0cm" fo:margin-bottom="0cm" loext:contextual-spacing="false" fo:line-height="150%" fo:text-align="justify" style:justify-single-word="false" fo:text-indent="-0.501cm" style:auto-text-indent="false">
        <style:tab-stops>
          <style:tab-stop style:position="5.756cm"/>
          <style:tab-stop style:position="8.505cm"/>
        </style:tab-stops>
      </style:paragraph-properties>
    </style:style>
    <style:style style:name="P13" style:family="paragraph" style:parent-style-name="Standard">
      <style:paragraph-properties fo:margin-left="1.251cm" fo:margin-right="0cm" fo:margin-top="0cm" fo:margin-bottom="0cm" loext:contextual-spacing="false" fo:line-height="150%" fo:text-align="justify" style:justify-single-word="false" fo:text-indent="-0.501cm" style:auto-text-indent="false">
        <style:tab-stops>
          <style:tab-stop style:position="5.756cm"/>
          <style:tab-stop style:position="6.255cm"/>
          <style:tab-stop style:position="8.505cm"/>
        </style:tab-stops>
      </style:paragraph-properties>
    </style:style>
    <style:style style:name="P14" style:family="paragraph" style:parent-style-name="Standard">
      <style:paragraph-properties fo:margin-left="1.251cm" fo:margin-right="0cm" fo:margin-top="0cm" fo:margin-bottom="0cm" loext:contextual-spacing="false" fo:line-height="150%" fo:text-align="justify" style:justify-single-word="false" fo:text-indent="-0.501cm" style:auto-text-indent="false">
        <style:tab-stops>
          <style:tab-stop style:position="5.756cm"/>
          <style:tab-stop style:position="6.255cm"/>
          <style:tab-stop style:position="8.505cm"/>
        </style:tab-stops>
      </style:paragraph-properties>
      <style:text-properties officeooo:paragraph-rsid="0016e50d"/>
    </style:style>
    <style:style style:name="P15"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8.505cm"/>
        </style:tab-stops>
      </style:paragraph-properties>
    </style:style>
    <style:style style:name="P16"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6.255cm"/>
          <style:tab-stop style:position="8.505cm"/>
        </style:tab-stops>
      </style:paragraph-properties>
    </style:style>
    <style:style style:name="P17"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255cm"/>
          <style:tab-stop style:position="8.505cm"/>
        </style:tab-stops>
      </style:paragraph-properties>
    </style:style>
    <style:style style:name="P18"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505cm"/>
          <style:tab-stop style:position="8.505cm"/>
        </style:tab-stops>
      </style:paragraph-properties>
    </style:style>
    <style:style style:name="P19"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505cm"/>
          <style:tab-stop style:position="8.505cm"/>
        </style:tab-stops>
      </style:paragraph-properties>
      <style:text-properties officeooo:paragraph-rsid="0017120a"/>
    </style:style>
    <style:style style:name="P20" style:family="paragraph" style:parent-style-name="Standard">
      <style:paragraph-properties fo:margin-left="1.251cm" fo:margin-right="0cm" fo:margin-top="0cm" fo:margin-bottom="0cm" loext:contextual-spacing="false" fo:line-height="150%" fo:text-align="justify" style:justify-single-word="false" fo:text-indent="-0.501cm" style:auto-text-indent="false">
        <style:tab-stops>
          <style:tab-stop style:position="5.756cm"/>
          <style:tab-stop style:position="8.505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21"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8.505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22"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006cm"/>
          <style:tab-stop style:position="8.505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23"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6.255cm"/>
          <style:tab-stop style:position="8.505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24"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255cm"/>
          <style:tab-stop style:position="8.505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25"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505cm"/>
          <style:tab-stop style:position="8.505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26" style:family="paragraph" style:parent-style-name="Text_20_body">
      <style:paragraph-properties fo:margin-left="1.251cm" fo:margin-right="0cm" fo:text-indent="-0.501cm" style:auto-text-indent="false">
        <style:tab-stops>
          <style:tab-stop style:position="3.251cm"/>
          <style:tab-stop style:position="4.501cm"/>
          <style:tab-stop style:position="5.752cm"/>
          <style:tab-stop style:position="5.756cm"/>
          <style:tab-stop style:position="6.505cm"/>
          <style:tab-stop style:position="7.003cm"/>
          <style:tab-stop style:position="7.504cm"/>
          <style:tab-stop style:position="8.005cm"/>
          <style:tab-stop style:position="8.505cm"/>
        </style:tab-stops>
      </style:paragraph-properties>
    </style:style>
    <style:style style:name="P27" style:family="paragraph" style:parent-style-name="Text_20_body">
      <style:paragraph-properties fo:margin-left="1.251cm" fo:margin-right="0cm" fo:text-indent="-0.501cm" style:auto-text-indent="false">
        <style:tab-stops>
          <style:tab-stop style:position="3.251cm"/>
          <style:tab-stop style:position="4.501cm"/>
          <style:tab-stop style:position="5.752cm"/>
          <style:tab-stop style:position="5.756cm"/>
          <style:tab-stop style:position="6.505cm"/>
          <style:tab-stop style:position="7.003cm"/>
          <style:tab-stop style:position="7.504cm"/>
          <style:tab-stop style:position="8.005cm"/>
          <style:tab-stop style:position="8.505cm"/>
        </style:tab-stops>
      </style:paragraph-properties>
      <style:text-properties style:font-name="Times New Roman" fo:font-size="10pt" style:font-size-asian="10pt"/>
    </style:style>
    <style:style style:name="P28" style:family="paragraph" style:parent-style-name="Standard">
      <style:paragraph-properties fo:margin-left="0.501cm" fo:margin-right="0cm" fo:margin-top="0cm" fo:margin-bottom="0cm" loext:contextual-spacing="false" fo:line-height="150%" fo:text-align="justify" style:justify-single-word="false" fo:text-indent="0cm" style:auto-text-indent="false">
        <style:tab-stops>
          <style:tab-stop style:position="3.507cm"/>
          <style:tab-stop style:position="6.257cm"/>
        </style:tab-stops>
      </style:paragraph-properties>
    </style:style>
    <style:style style:name="P29" style:family="paragraph" style:parent-style-name="Standard">
      <style:paragraph-properties fo:margin-left="0.501cm" fo:margin-right="0cm" fo:margin-top="0cm" fo:margin-bottom="0cm" loext:contextual-spacing="false" style:line-height-at-least="0.176cm" fo:text-align="justify" style:justify-single-word="false" fo:text-indent="-0.501cm" style:auto-text-indent="false">
        <style:tab-stops>
          <style:tab-stop style:position="3.507cm"/>
          <style:tab-stop style:position="4.006cm"/>
          <style:tab-stop style:position="6.257cm"/>
        </style:tab-stops>
      </style:paragraph-properties>
    </style:style>
    <style:style style:name="P30" style:family="paragraph" style:parent-style-name="Standard">
      <style:paragraph-properties fo:margin-left="0.501cm" fo:margin-right="0cm" fo:margin-top="0cm" fo:margin-bottom="0cm" loext:contextual-spacing="false" style:line-height-at-least="0.176cm" fo:text-align="justify" style:justify-single-word="false" fo:text-indent="-0.501cm" style:auto-text-indent="false">
        <style:tab-stops>
          <style:tab-stop style:position="3.507cm"/>
          <style:tab-stop style:position="4.256cm"/>
          <style:tab-stop style:position="6.257cm"/>
        </style:tab-stops>
      </style:paragraph-properties>
    </style:style>
    <style:style style:name="P31" style:family="paragraph" style:parent-style-name="Standard">
      <style:paragraph-properties fo:margin-left="0.501cm" fo:margin-right="0cm" fo:margin-top="0cm" fo:margin-bottom="0cm" loext:contextual-spacing="false" style:line-height-at-least="0.176cm" fo:text-align="justify" style:justify-single-word="false" fo:text-indent="-0.501cm" style:auto-text-indent="false">
        <style:tab-stops>
          <style:tab-stop style:position="3.507cm"/>
          <style:tab-stop style:position="6.257cm"/>
        </style:tab-stops>
      </style:paragraph-properties>
    </style:style>
    <style:style style:name="P32" style:family="paragraph" style:parent-style-name="Standard">
      <style:paragraph-properties fo:margin-left="0.501cm" fo:margin-right="0cm" fo:margin-top="0cm" fo:margin-bottom="0cm" loext:contextual-spacing="false" style:line-height-at-least="0.176cm" fo:text-align="justify" style:justify-single-word="false" fo:text-indent="-0.501cm" style:auto-text-indent="false">
        <style:tab-stops>
          <style:tab-stop style:position="3.507cm"/>
          <style:tab-stop style:position="4.006cm"/>
          <style:tab-stop style:position="6.257cm"/>
        </style:tab-stops>
      </style:paragraph-properties>
      <style:text-properties style:font-name="Times New Roman" fo:font-size="10pt" fo:font-weight="bold" style:font-name-asian="Times New Roman1" style:font-size-asian="10pt" style:language-asian="de" style:country-asian="DE" style:font-weight-asian="bold" style:font-name-complex="Times New Roman1" style:font-size-complex="10pt"/>
    </style:style>
    <style:style style:name="P33" style:family="paragraph" style:parent-style-name="Standard">
      <style:paragraph-properties fo:margin-left="0.501cm" fo:margin-right="0cm" fo:margin-top="0cm" fo:margin-bottom="0cm" loext:contextual-spacing="false" style:line-height-at-least="0.176cm" fo:text-align="justify" style:justify-single-word="false" fo:text-indent="-0.501cm" style:auto-text-indent="false">
        <style:tab-stops>
          <style:tab-stop style:position="3.507cm"/>
          <style:tab-stop style:position="4.256cm"/>
          <style:tab-stop style:position="6.257cm"/>
        </style:tab-stops>
      </style:paragraph-properties>
      <style:text-properties style:font-name="Times New Roman" fo:font-size="10pt" fo:font-weight="bold" style:font-name-asian="Times New Roman1" style:font-size-asian="10pt" style:language-asian="de" style:country-asian="DE" style:font-weight-asian="bold" style:font-name-complex="Times New Roman1" style:font-size-complex="10pt"/>
    </style:style>
    <style:style style:name="P34" style:family="paragraph" style:parent-style-name="Text_20_body">
      <style:paragraph-properties fo:margin-left="0.501cm" fo:margin-right="0cm" fo:text-indent="-0.501cm" style:auto-text-indent="false">
        <style:tab-stops>
          <style:tab-stop style:position="3.251cm"/>
          <style:tab-stop style:position="3.507cm"/>
          <style:tab-stop style:position="3.752cm"/>
          <style:tab-stop style:position="4.253cm"/>
          <style:tab-stop style:position="4.256cm"/>
          <style:tab-stop style:position="4.754cm"/>
          <style:tab-stop style:position="5.255cm"/>
          <style:tab-stop style:position="5.756cm"/>
          <style:tab-stop style:position="6.257cm"/>
        </style:tab-stops>
      </style:paragraph-properties>
    </style:style>
    <style:style style:name="P35" style:family="paragraph" style:parent-style-name="Text_20_body">
      <style:paragraph-properties fo:margin-left="0.501cm" fo:margin-right="0cm" fo:text-indent="-0.501cm" style:auto-text-indent="false">
        <style:tab-stops>
          <style:tab-stop style:position="3.251cm"/>
          <style:tab-stop style:position="3.507cm"/>
          <style:tab-stop style:position="3.752cm"/>
          <style:tab-stop style:position="4.253cm"/>
          <style:tab-stop style:position="4.256cm"/>
          <style:tab-stop style:position="4.754cm"/>
          <style:tab-stop style:position="5.255cm"/>
          <style:tab-stop style:position="5.756cm"/>
          <style:tab-stop style:position="6.257cm"/>
        </style:tab-stops>
      </style:paragraph-properties>
      <style:text-properties style:font-name="Times New Roman" fo:font-size="10pt" fo:font-weight="bold" style:font-size-asian="10pt" style:font-weight-asian="bold"/>
    </style:style>
    <style:style style:name="P36" style:family="paragraph" style:parent-style-name="Standard">
      <style:paragraph-properties fo:margin-left="0cm" fo:margin-right="0cm" fo:margin-top="0cm" fo:margin-bottom="0cm" loext:contextual-spacing="false" style:line-height-at-least="0.176cm" fo:text-align="justify" style:justify-single-word="false" fo:text-indent="-0.501cm" style:auto-text-indent="false">
        <style:tab-stops>
          <style:tab-stop style:position="2.004cm"/>
          <style:tab-stop style:position="2.503cm"/>
          <style:tab-stop style:position="4.754cm"/>
        </style:tab-stops>
      </style:paragraph-properties>
    </style:style>
    <style:style style:name="P37" style:family="paragraph" style:parent-style-name="Standard">
      <style:paragraph-properties fo:margin-left="0cm" fo:margin-right="0cm" fo:margin-top="0cm" fo:margin-bottom="0cm" loext:contextual-spacing="false" style:line-height-at-least="0.176cm" fo:text-align="justify" style:justify-single-word="false" fo:text-indent="-0.501cm" style:auto-text-indent="false">
        <style:tab-stops>
          <style:tab-stop style:position="0cm"/>
          <style:tab-stop style:position="1.251cm"/>
          <style:tab-stop style:position="3.251cm"/>
        </style:tab-stops>
      </style:paragraph-properties>
      <style:text-properties style:font-name="Times New Roman" fo:font-size="10pt" fo:font-weight="bold" style:font-name-asian="Times New Roman1" style:font-size-asian="10pt" style:language-asian="de" style:country-asian="DE" style:font-weight-asian="bold" style:font-name-complex="Times New Roman1" style:font-size-complex="10pt"/>
    </style:style>
    <style:style style:name="P38" style:family="paragraph" style:parent-style-name="Standard">
      <style:paragraph-properties fo:margin-left="1.251cm" fo:margin-right="0cm" fo:margin-top="0cm" fo:margin-bottom="0cm" loext:contextual-spacing="false" style:line-height-at-least="0.176cm" fo:text-indent="0cm" style:auto-text-indent="false"/>
    </style:style>
    <style:style style:name="P39" style:family="paragraph" style:parent-style-name="Standard">
      <style:paragraph-properties fo:margin-left="1.251cm" fo:margin-right="0cm" fo:margin-top="0cm" fo:margin-bottom="0cm" loext:contextual-spacing="false" style:line-height-at-least="0.176cm" fo:text-align="justify" style:justify-single-word="false" fo:text-indent="0cm" style:auto-text-indent="false">
        <style:tab-stops>
          <style:tab-stop style:position="6.505cm"/>
          <style:tab-stop style:position="8.505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40" style:family="paragraph" style:parent-style-name="Standard">
      <style:paragraph-properties fo:margin-left="1.251cm" fo:margin-right="0.635cm" fo:margin-top="0cm" fo:margin-bottom="0cm" loext:contextual-spacing="false" style:line-height-at-least="0.176cm" fo:text-indent="0cm" style:auto-text-indent="false">
        <style:tab-stops>
          <style:tab-stop style:position="11.753cm" style:type="center"/>
          <style:tab-stop style:position="19.754cm" style:type="right"/>
        </style:tab-stops>
      </style:paragraph-properties>
    </style:style>
    <style:style style:name="P41" style:family="paragraph" style:parent-style-name="Standard">
      <style:paragraph-properties fo:margin-left="0.751cm" fo:margin-right="0cm" fo:margin-top="0cm" fo:margin-bottom="0cm" loext:contextual-spacing="false" style:line-height-at-least="0.176cm" fo:text-align="justify" style:justify-single-word="false" fo:text-indent="-0.751cm" style:auto-text-indent="false"/>
    </style:style>
    <style:style style:name="P42" style:family="paragraph" style:parent-style-name="Standard">
      <style:paragraph-properties fo:margin-left="-1.27cm" fo:margin-right="0cm" fo:margin-top="0cm" fo:margin-bottom="0cm" loext:contextual-spacing="false" style:line-height-at-least="0.176cm" fo:text-align="justify" style:justify-single-word="false" fo:text-indent="-0.501cm" style:auto-text-indent="false">
        <style:tab-stops>
          <style:tab-stop style:position="-0.035cm"/>
          <style:tab-stop style:position="0.714cm"/>
          <style:tab-stop style:position="2.715cm"/>
        </style:tab-stops>
      </style:paragraph-properties>
    </style:style>
    <style:style style:name="P43" style:family="paragraph" style:parent-style-name="Standard">
      <style:paragraph-properties fo:margin-left="0cm" fo:margin-right="-0.004cm" fo:margin-top="0cm" fo:margin-bottom="0cm" loext:contextual-spacing="false" fo:line-height="150%" fo:text-align="justify" style:justify-single-word="false" fo:text-indent="0cm" style:auto-text-indent="false">
        <style:tab-stops>
          <style:tab-stop style:position="3.251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44" style:family="paragraph" style:parent-style-name="Standard">
      <style:paragraph-properties fo:margin-left="0cm" fo:margin-right="0cm" fo:margin-top="0cm" fo:margin-bottom="0cm" loext:contextual-spacing="false" style:line-height-at-least="0.176cm" fo:text-align="justify" style:justify-single-word="false" fo:text-indent="0cm" style:auto-text-indent="false">
        <style:tab-stops>
          <style:tab-stop style:position="1.503cm"/>
          <style:tab-stop style:position="2.252cm"/>
          <style:tab-stop style:position="4.253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45" style:family="paragraph" style:parent-style-name="Standard">
      <style:paragraph-properties fo:margin-left="0cm" fo:margin-right="0cm" fo:margin-top="0cm" fo:margin-bottom="0cm" loext:contextual-spacing="false" fo:line-height="150%" fo:text-align="start" style:justify-single-word="false" fo:text-indent="0cm" style:auto-text-indent="false">
        <style:tab-stops>
          <style:tab-stop style:position="1.503cm"/>
          <style:tab-stop style:position="2.252cm"/>
          <style:tab-stop style:position="4.253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0.501cm"/>
          <style:tab-stop style:position="1.251cm"/>
          <style:tab-stop style:position="3.251cm"/>
        </style:tab-stops>
      </style:paragraph-properties>
      <style:text-properties style:font-name="Times New Roman" fo:font-size="10pt" officeooo:paragraph-rsid="001ae536" style:font-name-asian="Times New Roman1" style:font-size-asian="10pt" style:language-asian="de" style:country-asian="DE" style:font-name-complex="Times New Roman1" style:font-size-complex="10pt"/>
    </style:style>
    <style:style style:name="P47" style:family="paragraph" style:parent-style-name="Text_20_body">
      <style:paragraph-properties>
        <style:tab-stops>
          <style:tab-stop style:position="0cm"/>
          <style:tab-stop style:position="1.251cm"/>
          <style:tab-stop style:position="3.251cm"/>
        </style:tab-stops>
      </style:paragraph-properties>
      <style:text-properties style:font-name="Times New Roman" fo:font-size="10pt" style:font-size-asian="10pt"/>
    </style:style>
    <style:style style:name="P48"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font-weight="bold" style:font-name-asian="Times New Roman1" style:font-size-asian="14pt" style:language-asian="de" style:country-asian="DE" style:font-weight-asian="bold" style:font-name-complex="Times New Roman1" style:font-size-complex="14pt"/>
    </style:style>
    <style:style style:name="P49" style:family="paragraph" style:parent-style-name="Standard">
      <style:paragraph-properties fo:margin-left="1.251cm" fo:margin-right="0cm" fo:margin-top="0cm" fo:margin-bottom="0cm" loext:contextual-spacing="false" fo:line-height="150%" fo:text-align="justify" style:justify-single-word="false" fo:text-indent="-0.501cm" style:auto-text-indent="false">
        <style:tab-stops>
          <style:tab-stop style:position="5.756cm"/>
          <style:tab-stop style:position="8.505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50"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255cm"/>
          <style:tab-stop style:position="8.505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51" style:family="paragraph" style:parent-style-name="Standard" style:list-style-name="WWNum3">
      <style:paragraph-properties fo:margin-left="2.773cm" fo:margin-right="0cm" fo:margin-top="0cm" fo:margin-bottom="0cm" loext:contextual-spacing="false" style:line-height-at-least="0.176cm" fo:text-align="justify" style:justify-single-word="false" fo:text-indent="-0.635cm" style:auto-text-indent="false">
        <style:tab-stops>
          <style:tab-stop style:position="9.55cm"/>
          <style:tab-stop style:position="10.299cm"/>
          <style:tab-stop style:position="12.3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52" style:family="paragraph" style:parent-style-name="Standard" style:list-style-name="WWNum1">
      <style:paragraph-properties fo:margin-left="1.27cm" fo:margin-right="0cm" fo:margin-top="0cm" fo:margin-bottom="0cm" loext:contextual-spacing="false" style:line-height-at-least="0.176cm" fo:text-align="justify" style:justify-single-word="false" fo:text-indent="-0.635cm" style:auto-text-indent="false">
        <style:tab-stops>
          <style:tab-stop style:position="7.352cm"/>
          <style:tab-stop style:position="10.102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53" style:family="paragraph" style:parent-style-name="List_20_Paragraph" style:list-style-name="WWNum2">
      <style:paragraph-properties fo:margin-left="1.27cm" fo:margin-right="0cm" fo:text-align="justify" style:justify-single-word="false" fo:text-indent="-0.635cm" style:auto-text-indent="false">
        <style:tab-stops>
          <style:tab-stop style:position="10.91cm"/>
          <style:tab-stop style:position="13.39cm"/>
        </style:tab-stops>
      </style:paragraph-properties>
    </style:style>
    <style:style style:name="P54" style:family="paragraph" style:parent-style-name="List_20_Paragraph" style:list-style-name="WWNum2">
      <style:paragraph-properties fo:margin-left="1.27cm" fo:margin-right="0cm" fo:text-align="justify" style:justify-single-word="false" fo:text-indent="-0.635cm" style:auto-text-indent="false">
        <style:tab-stops>
          <style:tab-stop style:position="10.91cm"/>
          <style:tab-stop style:position="13.39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T1" style:family="text">
      <style:text-properties style:font-name="Times New Roman" fo:font-size="10pt" style:font-name-asian="Times New Roman1" style:font-size-asian="10pt" style:language-asian="de" style:country-asian="DE" style:font-name-complex="Times New Roman1" style:font-size-complex="10pt"/>
    </style:style>
    <style:style style:name="T2" style:family="text">
      <style:text-properties style:font-name="Times New Roman" fo:font-size="10pt" officeooo:rsid="0016e50d" style:font-name-asian="Times New Roman1" style:font-size-asian="10pt" style:language-asian="de" style:country-asian="DE" style:font-name-complex="Times New Roman1" style:font-size-complex="10pt"/>
    </style:style>
    <style:style style:name="T3" style:family="text">
      <style:text-properties style:font-name="Times New Roman" fo:font-size="10pt" officeooo:rsid="0017120a" style:font-name-asian="Times New Roman1" style:font-size-asian="10pt" style:language-asian="de" style:country-asian="DE" style:font-name-complex="Times New Roman1" style:font-size-complex="10pt"/>
    </style:style>
    <style:style style:name="T4" style:family="text">
      <style:text-properties style:font-name="Times New Roman" fo:font-size="10pt" officeooo:rsid="00184a44" style:font-name-asian="Times New Roman1" style:font-size-asian="10pt" style:language-asian="de" style:country-asian="DE" style:font-name-complex="Times New Roman1" style:font-size-complex="10pt"/>
    </style:style>
    <style:style style:name="T5" style:family="text">
      <style:text-properties style:font-name="Times New Roman" fo:font-size="10pt" officeooo:rsid="0019d2b8" style:font-name-asian="Times New Roman1" style:font-size-asian="10pt" style:language-asian="de" style:country-asian="DE" style:font-name-complex="Times New Roman1" style:font-size-complex="10pt"/>
    </style:style>
    <style:style style:name="T6" style:family="text">
      <style:text-properties style:font-name="Times New Roman" fo:font-size="10pt" officeooo:rsid="001c91bd" style:font-name-asian="Times New Roman1" style:font-size-asian="10pt" style:language-asian="de" style:country-asian="DE" style:font-name-complex="Times New Roman1" style:font-size-complex="10pt"/>
    </style:style>
    <style:style style:name="T7" style:family="text">
      <style:text-properties style:font-name="Times New Roman" fo:font-size="10pt" officeooo:rsid="001d2b19" style:font-name-asian="Times New Roman1" style:font-size-asian="10pt" style:language-asian="de" style:country-asian="DE" style:font-name-complex="Times New Roman1" style:font-size-complex="10pt"/>
    </style:style>
    <style:style style:name="T8" style:family="text">
      <style:text-properties style:font-name="Times New Roman" fo:font-size="10pt" officeooo:rsid="001e475f" style:font-name-asian="Times New Roman1" style:font-size-asian="10pt" style:language-asian="de" style:country-asian="DE" style:font-name-complex="Times New Roman1" style:font-size-complex="10pt"/>
    </style:style>
    <style:style style:name="T9" style:family="text">
      <style:text-properties style:font-name="Times New Roman" fo:font-size="10pt" fo:font-weight="bold" style:font-name-asian="Times New Roman1" style:font-size-asian="10pt" style:language-asian="de" style:country-asian="DE" style:font-weight-asian="bold" style:font-name-complex="Times New Roman1" style:font-size-complex="10pt"/>
    </style:style>
    <style:style style:name="T10" style:family="text">
      <style:text-properties style:font-name="Times New Roman" fo:font-size="10pt" style:font-size-asian="10pt"/>
    </style:style>
    <style:style style:name="T11" style:family="text">
      <style:text-properties style:font-name="Times New Roman" style:font-name-asian="Times New Roman1" style:language-asian="de" style:country-asian="DE" style:font-name-complex="Times New Roman1"/>
    </style:style>
    <style:style style:name="T12" style:family="text">
      <style:text-properties officeooo:rsid="001c91bd"/>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trxm/db/invoke/0d075735/main@default/banking$1.0@trxm.DisplayTransactions(db)/gvo/account-turnovers/load.account.turnovers.do"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Wohnungs-Mietvertrag <text:s text:c="3"/></text:p>
      <text:p text:style-name="P43">DieVermieter<text:tab/>Herbrand und Oksana Hofker<text:tab/><text:tab/><text:tab/></text:p>
      <text:p text:style-name="P6">wohnhaft in<text:tab/><text:span text:style-name="T12"> Oudaen 26, 8219 AB Lelystad, Niederlande</text:span></text:p>
      <text:p text:style-name="P10"><text:span text:style-name="T1">und der (die Mieter)<text:tab/></text:span><text:span text:style-name="T6">Frank Creon</text:span></text:p>
      <text:p text:style-name="P11"><text:tab/></text:p>
      <text:p text:style-name="P5">schließen folgenden Mietvertrag:</text:p>
      <text:p text:style-name="P1"/>
      <text:p text:style-name="P7">§ 1 Mieträume</text:p>
      <text:p text:style-name="P1"/>
      <text:p text:style-name="P20">1. <text:tab/>Im Hause</text:p>
      <text:p text:style-name="P12"><text:span text:style-name="T1"><text:tab/>KLEVE, Hauptstrasse 2</text:span><text:span text:style-name="T6">5</text:span><text:span text:style-name="T1"> , </text:span><text:span text:style-name="T2"><text:s/></text:span><text:span text:style-name="T6">D</text:span><text:span text:style-name="T1">G</text:span></text:p>
      <text:p text:style-name="P20"><text:tab/>werden folgende Räume vermietet:</text:p>
      <text:p text:style-name="P12"><text:span text:style-name="T1"><text:tab/></text:span><text:span text:style-name="T6">1 Schlafzimmer, 1</text:span><text:span text:style-name="T1"> </text:span><text:span text:style-name="T6">Wohnz</text:span><text:span text:style-name="T1">immer </text:span><text:span text:style-name="T6">mit </text:span><text:span text:style-name="T1">Küche, 1 Badezimmer mit </text:span><text:span text:style-name="T6">D</text:span><text:span text:style-name="T7">usche</text:span><text:span text:style-name="T1">/WC, <text:s/>1 Kellerräume</text:span></text:p>
      <text:p text:style-name="P20">2.<text:tab/>Dem Mieter werden vom Vermieter für die Mietzeit ausgehändigt:</text:p>
      <text:p text:style-name="P12"><text:span text:style-name="T1"><text:tab/> </text:span><text:span text:style-name="T2">1</text:span><text:span text:style-name="T1"> Haus-Schlüssel., </text:span><text:span text:style-name="T2">1</text:span><text:span text:style-name="T1"> Wohnungs-,Schlüssel,</text:span><text:span text:style-name="T2">1</text:span><text:span text:style-name="T1"> Keller-Schlüssel.</text:span></text:p>
      <text:p text:style-name="P12"><text:span text:style-name="T1">3. <text:s/>Die Wohnfläche beträgt <text:s/></text:span><text:span text:style-name="T7">48,9</text:span><text:span text:style-name="T2"> </text:span><text:span text:style-name="T1">qm.</text:span></text:p>
      <text:p text:style-name="P20">4. <text:s/>Die Wohnung ist eine Eigentumswohnung. <text:s/></text:p>
      <text:p text:style-name="P2"/>
      <text:p text:style-name="P2"/>
      <text:p text:style-name="P8">§ 2 Mietzeit</text:p>
      <text:p text:style-name="P2"/>
      <text:p text:style-name="P28"><text:span text:style-name="T1">Das Mietverhältnis beginnt am: 1 </text:span><text:span text:style-name="T7">November</text:span><text:span text:style-name="T4"> </text:span><text:span text:style-name="T1"><text:s/>201</text:span><text:span text:style-name="T7">8</text:span><text:span text:style-name="T1">, es läuft auf unbestimmte Zeit.</text:span></text:p>
      <text:p text:style-name="P2"/>
      <text:p text:style-name="P8">§ 3 Miete</text:p>
      <text:p text:style-name="P2"/>
      <text:p text:style-name="P12"><text:span text:style-name="T1">1.<text:tab/>Die Miete beträgt monatlich: </text:span><text:span text:style-name="T7">39</text:span><text:span text:style-name="T8">0</text:span><text:span text:style-name="T1"> Euro.</text:span></text:p>
      <text:p text:style-name="P12"><text:span text:style-name="T1"><text:tab/>in Worten: </text:span><text:span text:style-name="T7">drei</text:span><text:span text:style-name="T1">hundert </text:span><text:span text:style-name="T7">neunzig</text:span><text:span text:style-name="T5"> </text:span><text:span text:style-name="T1"><text:s/>Euro.</text:span></text:p>
      <text:p text:style-name="P21"><text:tab/>Mieterhöhungen und alle anderen Erklärungen, die Vertragsänderungen betreffen, muss der Vermieter schriftlich abgeben. Soweit gesetzlich zulässig, reicht die Abgabe der Erklärung in Textform aus.</text:p>
      <text:p text:style-name="P15"/>
      <text:p text:style-name="P15"/>
      <text:p text:style-name="P22">2.<text:tab/>Zusätzlich zur Miete bezahlt der Mieter</text:p>
      <text:p text:style-name="P22"><text:tab/></text:p>
      <text:p text:style-name="P13"><text:span text:style-name="T1"><text:tab/>für Heizung und Warmwasser,Wasserversorgung, Entwässerung, Müllabfuhr, Grundsteuer, Gartenpflege, <text:s/>Hausmeister, Straßenreinigung, Allgemeinstrom ,Satelit-TV <text:s/>eine Vorauszahlung in Höhe von <text:s/></text:span><text:span text:style-name="T7">80</text:span><text:span text:style-name="T1"> Euro </text:span><text:span text:style-name="T2">(In Worten : </text:span><text:span text:style-name="T7">achtzig</text:span><text:span text:style-name="T2"> Euro) </text:span><text:span text:style-name="T1">monatlich.</text:span></text:p>
      <text:p text:style-name="P23"><text:tab/>Über die Vorauszahlungen wird jährlich abgerechnet.</text:p>
      <text:p text:style-name="P16"/>
      <text:p text:style-name="P14"><text:span text:style-name="T1">3.<text:tab/>Der Gesamtbetrag der Miete in Höhe von monatlich <text:s/></text:span><text:span text:style-name="T7">47</text:span><text:span text:style-name="T8">0</text:span><text:span text:style-name="T2"> </text:span><text:span text:style-name="T1">Euro ist auf das Konto 0902155 bei die Deutsche Bank Kleve, blz 32470024 ,des Vermieters zu zahlen. </text:span><text:span text:style-name="T2">(IBAN DE4732470024009021550)</text:span></text:p>
      <text:p text:style-name="P29"/>
      <text:p text:style-name="P29"/>
      <text:p text:style-name="P32">§ 4 Verteilung und Abrechnung der Heiz- und Betriebskosten</text:p>
      <text:p text:style-name="P29"/>
      <text:p text:style-name="P24">1.<text:tab/>Soweit Vorauszahlungen vereinbart wurden gilt folgendes: Sind bei den Kosten für Heizung und Warmwasser die Grundsätze über die verbrauchsabhängige Heizkostenabrechnung maßgeblich, <text:s/>werden die Kosten des Betriebes der zentralen Heizungsanlage und der zentralen Warmwasserversorgung anteilig auf die Mieter des Hauses umgelegt.</text:p>
      <text:p text:style-name="P17"><text:soft-page-break/></text:p>
      <text:p text:style-name="P24">2.<text:tab/>Die Gesamtkosten für Heizung und Warmwasser werden zu 50 % nach Wohnfläche (qm-Zahl) und zu 50 % nach dem festgestellten Wärmeverbrauch umgelegt, soweit nicht nachstehend ein anderer nach der Heizkostenverordnung zulässiger Verteilerschlüssel gewählt wurde.</text:p>
      <text:p text:style-name="P17"/>
      <text:p text:style-name="P24">3.<text:tab/>Andere Betriebskosten werden verbrauchsabhängig oder verursachungsabhängig abgerechnet, soweit sie entsprechend erfasst werden. Anderenfalls erfolgt die Abrechnung über</text:p>
      <text:p text:style-name="P36"/>
      <text:list xml:id="list4223671378" text:style-name="WWNum3">
        <text:list-item>
          <text:p text:style-name="P51">die Betriebskosten nach dem Anteil der Wohnfläche;<text:tab/></text:p>
        </text:list-item>
        <text:list-item>
          <text:p text:style-name="P51">die Betriebskosten für Wasserversorgung, Entwässerung und Müllabfuhr nach Personenzahl. </text:p>
        </text:list-item>
      </text:list>
      <text:p text:style-name="P44"><text:s text:c="9"/></text:p>
      <text:p text:style-name="P44"><text:s text:c="8"/>4. <text:s/>Über die Heiz- und Betriebskosten wird einmal jährlich innerhalb angemessener Frist abgerechnet.</text:p>
      <text:p text:style-name="P45"><text:s text:c="13"/>Der Abrechnungszeitraum endet jeweils zum 31 Dezember.</text:p>
      <text:p text:style-name="P18"/>
      <text:p text:style-name="P39">Über- oder unterschreiten die Vorauszahlungen die tatsächlichen Kosten, so kann jede Vertragspartei die Vorauszahlung auf einen angemessenen Betrag anpassen.</text:p>
      <text:p text:style-name="P3"/>
      <text:p text:style-name="P3"/>
      <text:p text:style-name="P33">§ 5 Mängel und Schäden an der Wohnung</text:p>
      <text:p text:style-name="P30"/>
      <text:p text:style-name="P25">1.<text:tab/>Zeigt sich in der Wohnung ein Mangel, so muss dies der Mieter dem Vermieter unverzüglich mitteilen.</text:p>
      <text:p text:style-name="P40"/>
      <text:p text:style-name="P25">2.<text:tab/>Der Mieter haftet dem Vermieter für Schäden, die er selbst, seine Mitbewohner, Hausgehilfen, Untermieter sowie von ihm beauftragte Handwerker nach dem Einzug schuldhaft verursacht haben.</text:p>
      <text:p text:style-name="P18"/>
      <text:p text:style-name="P30"/>
      <text:p text:style-name="P41"><text:span text:style-name="T9">§ 6 <text:tab/></text:span><text:bookmark-start text:name="_GoBack"/><text:span text:style-name="T9">Schönheitsreparaturen</text:span></text:p>
      <text:p text:style-name="P42"/>
      <text:list xml:id="list1271734988" text:style-name="WWNum2">
        <text:list-item>
          <text:p text:style-name="P53"><text:span text:style-name="T1">Die Schönheitsreparaturen übernimmt der Mieter. Hierzu gehören das </text:span><text:span text:style-name="T11">Tapezieren, Streichen, Kalken der Wände und Decken, das </text:span><text:span text:style-name="T1">Streichen von Fußböden bzw. die Reinigung des Teppichbodens bzw. das Abschleifen von Parkett- bzw. Holzböden, das Streichen der Innentüren, das Streichen der Heizkörper und Heizungsrohre sowie das Streichen der Fenster und Außentüren von innen.</text:span></text:p>
        </text:list-item>
        <text:list-item>
          <text:p text:style-name="P54">Die Schönheitsreparaturen sind durchzuführen, wenn die Abnutzung es erfordert, im Allgemeinen in den Nassräumen alle drei Jahre, sonst alle fünf Jahre.</text:p>
        </text:list-item>
      </text:list>
      <text:p text:style-name="P30"><text:bookmark-end text:name="_GoBack"/></text:p>
      <text:p text:style-name="P33">§ 7 Ausbesserungen und bauliche Veränderungen</text:p>
      <text:p text:style-name="P30"/>
      <text:list xml:id="list2872350585" text:style-name="WWNum1">
        <text:list-item>
          <text:p text:style-name="P52">Der Mieter hat Maßnahmen in der Wohnung oder im Haus zu dulden, die erforderlich sind, um sie oder das Gebäude zu erhalten (Instandsetzungs- und Instandhaltungsmaßnahmen).</text:p>
        </text:list-item>
      </text:list>
      <text:p text:style-name="P31"/>
      <text:list xml:id="list170152963009708" text:continue-numbering="true" text:style-name="WWNum1">
        <text:list-item>
          <text:p text:style-name="P52">Maßnahmen zur Verbesserung der Wohnung oder sonstiger Teile des Hauses oder zur Einsparung von Energie oder Wasser (Modernisierungen) hat der Mieter zu dulden, soweit die geplanten Maßnahmen oder die zu erwartende Mieterhöhung für ihn, seine Familie oder einen anderen Angehörigen seines Haushaltes nicht zu einer ungerechtfertigten Härte führen würde.</text:p>
        </text:list-item>
      </text:list>
      <text:p text:style-name="P31"/>
      <text:p text:style-name="P30"/>
      <text:p text:style-name="P35">§ 8 Nutzung der Mieträume, Untervermietung</text:p>
      <text:p text:style-name="P34"/>
      <text:p text:style-name="P27">1.<text:tab/>Der Mieter kann jederzeit Ehegatten, Familienangehörige oder Lebenspartner, die mit dem Mieter einen auf Dauer angelegten gemeinsamen Haushalt führen wollen, in die Wohnung aufnehmen, wenn diese dadurch nicht überbelegt wird. </text:p>
      <text:p text:style-name="P26"/>
      <text:p text:style-name="P26"><text:span text:style-name="T10">2.<text:tab/>Der Mieter darf die Wohnung nur mit Erlaubnis des Vermieters untervermieten. Der Vermieter muss dies erlauben, wenn für den Mieter nach dem Abschluss des Vertrages ein berechtigtes Interesse daran besteht, einen Teil bzw. die ganze Wohnung einem Dritten zum Gebrauch zu überlassen. Dies gilt nicht, </text:span><text:soft-page-break/><text:span text:style-name="T10">wenn die Wohnung durch die Untervermietung überbelegt würde oder wenn in der Person des Untermieters ein wichtiger Grund für die Verweigerung vorliegt.</text:span></text:p>
      <text:p text:style-name="P26"/>
      <text:p text:style-name="P27">3.<text:tab/>Eine Berufsausübung in der Wohnung ist dann genehmigungspflichtig, wenn hierdurch erhebliche Interessen der Nachbarn oder des Vermieters berührt werden. Telearbeit und nicht störende Betätigungen sind ohne Genehmigung zulässig.</text:p>
      <text:p text:style-name="P26"/>
      <text:p text:style-name="P34"/>
      <text:p text:style-name="P37"><text:tab/>§ 9 Tierhaltung</text:p>
      <text:p text:style-name="P18"/>
      <text:p text:style-name="P25">1.<text:tab/>Der Mieter darf in der Wohnung kleine Haustiere halten (Katze, Wellensittich, Meerschwein u.ä.), soweit dies nach Anzahl und Größe der Tiere allgemein üblichen Vorstellungen entspricht. Für größere Haustiere ist die Erlaubnis des Vermieters einzuholen</text:p>
      <text:p text:style-name="P18"/>
      <text:p text:style-name="P25">2.<text:tab/>Der Vermieter kann der Tierhaltung widersprechen, wenn durch die Tierhaltung die Hausgemeinschaft belästigt wird.</text:p>
      <text:p text:style-name="P30"/>
      <text:p text:style-name="P30"/>
      <text:p text:style-name="P33">§ 10 Gartennutzung</text:p>
      <text:p text:style-name="P30"/>
      <text:p text:style-name="P25">1.<text:tab/>Der Mieter darf den zum Haus gehörenden Garten nutzen.</text:p>
      <text:p text:style-name="P18"/>
      <text:p text:style-name="P25">2.<text:tab/>Die Pflege des Gartens übernimmt der <text:s/>Vermieter.</text:p>
      <text:p text:style-name="P30"/>
      <text:p text:style-name="P30"/>
      <text:p text:style-name="P33">§ 11 Fernseh- und Rundfunkempfang</text:p>
      <text:p text:style-name="P30"/>
      <text:p text:style-name="P25">1.<text:tab/>Der Vermieter ist berechtigt, mit Zustimmung der Mehrheit der Mieter anstelle von Einzelantennen eine Gemeinschaftsantenne für alle üblichen Rundfunk- und Fernsehprogramme zu errichten. In diesem Falle ist der Mieter verpflichtet, seine Einzelantenne zu entfernen, sofern nicht in Ausnahmefällen wichtige Gründe für die Beibehaltung vorliegen. Das gilt sinngemäß für Satellitenempfangsanlagen. </text:p>
      <text:p text:style-name="P30"/>
      <text:p text:style-name="P30"/>
      <text:p text:style-name="P9">§ 12 Betreten der Mieträume durch den Vermieter</text:p>
      <text:p text:style-name="P30"/>
      <text:p text:style-name="P25">1.<text:tab/>Der Vermieter oder sein Beauftragter kann die Mieträume, soweit wichtige Gründe (Haus- oder Wohnungsverkauf, Kündigung, Reparaturen) dies erfordern, zusammen mit Interessenten oder Handwerkern nach vorheriger Abstimmung mit dem Mieter betreten. Dabei hat er auf die Arbeitszeit des Mieters oder sonstige persönliche Hinderungsgründe Rücksicht zu nehmen. </text:p>
      <text:p text:style-name="P18"/>
      <text:p text:style-name="P25">2.<text:tab/>Damit der Vermieter im Notfall auch bei längerer Abwesenheit des Mieters Zugang zur Wohnung hat, muss dieser dem Vermieter mitteilen, wem er zu diesem Zweck einen Wohnungsschlüssel überlassen hat.</text:p>
      <text:p text:style-name="P34"/>
      <text:p text:style-name="P35">§ 13 Auszug des Mieters</text:p>
      <text:p text:style-name="P34"/>
      <text:p text:style-name="P47">Zieht der Mieter aus, muss er die Räume besenrein und mit sämtlichen Schlüsseln dem Vermieter oder seinem Verwalter zurückgeben.</text:p>
      <text:p text:style-name="P34"/>
      <text:p text:style-name="P33">§ 21 Mehrere Mieter</text:p>
      <text:p text:style-name="P30"/>
      <text:p text:style-name="P25">1.<text:tab/>Mehrere Mieter haften für alle Verpflichtungen aus dem Mietverhältnis als Gesamtschuldner.</text:p>
      <text:p text:style-name="P18"/>
      <text:p text:style-name="P25">2.<text:tab/>Kündigungen, Mieterhöhungen sowie andere Erklärungen mit dem Ziel, eine Vertragsänderung herbei zu führen, müssen von oder gegenüber allen Mietern abgegeben werden.</text:p>
      <text:p text:style-name="P18"/>
      <text:p text:style-name="P33">§ 22 Sonstige Vereinbarungen</text:p>
      <text:p text:style-name="P30"/>
      <text:p text:style-name="P25">1.<text:tab/>Die Hausordnung ist Bestandteil dieses Vertrages, wenn sie ihm beigefügt ist. Wesentliche Verpflichtungen des Mietvertrages können hierdurch nicht abgeändert oder ergänzt werden.</text:p>
      <text:p text:style-name="P38"><text:soft-page-break/></text:p>
      <text:p text:style-name="P19"><text:span text:style-name="T1">2. Mieter und Vermieter vereinbaren als Sicherheit eine Mietkaution in Höhe von </text:span><text:span text:style-name="T7">47</text:span><text:span text:style-name="T8">0</text:span><text:span text:style-name="T1"> Euro, zu bezahlen bei Anfang von die Miete. </text:span><text:span text:style-name="T3">Das Konto für die Kaution isst IB</text:span><text:span text:style-name="T2">AN DE4732470024009021550 </text:span><text:span text:style-name="T3">bei Deutsche Bank auf <text:s/>Name Hofker.</text:span></text:p>
      <text:p text:style-name="P18"/>
      <text:p text:style-name="P46"/>
      <text:p text:style-name="P3"/>
      <text:p text:style-name="P3"><text:span text:style-name="T1"><text:tab/>Kleve Montag, den </text:span><text:span text:style-name="T7">19</text:span><text:span text:style-name="T4"> </text:span><text:span text:style-name="T1"><text:s/></text:span><text:span text:style-name="T7">Oktober</text:span><text:span text:style-name="T4"> </text:span><text:span text:style-name="T1"><text:s/>201</text:span><text:span text:style-name="T7">8</text:span></text:p>
      <text:p text:style-name="P3"/>
      <text:p text:style-name="P3"/>
      <text:p text:style-name="P3"><text:tab/>Vermieter:<text:tab/><text:tab/><text:tab/><text:tab/>Mieter </text:p>
      <text:p text:style-name="P4"><text:span text:style-name="T1"><text:tab/>Herbrand Hofker<text:tab/><text:tab/><text:tab/><text:tab/></text:span><text:span text:style-name="T7">Frank Cre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 svg:font-family="Symbol" style:font-adornments="Standaard" style:font-family-generic="roman" style:font-pitch="variable"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nl" fo:country="NL"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ab-stops/>
      </style:paragraph-properties>
      <style:text-properties fo:color="#00000a" style:font-name="Calibri" fo:font-family="Calibri" style:font-family-generic="roman" style:font-pitch="variable" fo:font-size="11pt" fo:language="de" fo:country="DE"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loext:contextual-spacing="false" style:line-height-at-least="0.176cm" fo:text-align="justify" style:justify-single-word="false">
        <style:tab-stops>
          <style:tab-stop style:position="3.251cm"/>
        </style:tab-stops>
      </style:paragraph-properties>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de" style:country-asian="DE" style:font-name-complex="Times New Roman1" style:font-family-complex="'Times New Roman'" style:font-family-generic-complex="system" style:font-pitch-complex="variable" style:font-size-complex="10pt"/>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style:line-height-at-least="0.176cm"/>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Head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Default_20_Paragraph_20_Font" style:display-name="Default Paragraph Font" style:family="text"/>
    <style:style style:name="Textkörper_20_Zchn" style:display-name="Textkörper Zchn"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de" style:country-asian="DE" style:font-name-complex="Times New Roman1" style:font-family-complex="'Times New Roman'" style:font-family-generic-complex="system" style:font-pitch-complex="variable" style:font-size-complex="10pt"/>
    </style:style>
    <style:style style:name="HTML_20_Vorformatiert_20_Zchn" style:display-name="HTML Vorformatiert Zchn"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17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44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71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98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25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52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79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06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3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 style:num-suffix="" text:bullet-char="">
        <style:list-level-properties text:list-level-position-and-space-mode="label-alignment">
          <style:list-level-label-alignment text:label-followed-by="listtab" text:list-tab-stop-position="2.773cm" fo:text-indent="-0.635cm" fo:margin-left="2.773cm"/>
        </style:list-level-properties>
        <style:text-properties style:font-name="Symbol"/>
      </text:list-level-style-bullet>
      <text:list-level-style-bullet text:level="2" text:style-name="ListLabel_20_8" style:num-suffix="◦" text:bullet-char="◦">
        <style:list-level-properties text:list-level-position-and-space-mode="label-alignment">
          <style:list-level-label-alignment text:label-followed-by="listtab" text:list-tab-stop-position="3.408cm" fo:text-indent="-0.635cm" fo:margin-left="3.408cm"/>
        </style:list-level-properties>
        <style:text-properties style:font-name="OpenSymbol1"/>
      </text:list-level-style-bullet>
      <text:list-level-style-bullet text:level="3" text:style-name="ListLabel_20_9" style:num-suffix="▪" text:bullet-char="▪">
        <style:list-level-properties text:list-level-position-and-space-mode="label-alignment">
          <style:list-level-label-alignment text:label-followed-by="listtab" text:list-tab-stop-position="4.043cm" fo:text-indent="-0.635cm" fo:margin-left="4.043cm"/>
        </style:list-level-properties>
        <style:text-properties style:font-name="OpenSymbol1"/>
      </text:list-level-style-bullet>
      <text:list-level-style-bullet text:level="4" text:style-name="ListLabel_20_10"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text:list-tab-stop-position="5.313cm" fo:text-indent="-0.635cm" fo:margin-left="5.313cm"/>
        </style:list-level-properties>
        <style:text-properties style:font-name="OpenSymbol1"/>
      </text:list-level-style-bullet>
      <text:list-level-style-bullet text:level="6" text:style-name="ListLabel_20_12"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OpenSymbol1"/>
      </text:list-level-style-bullet>
      <text:list-level-style-bullet text:level="7" text:style-name="ListLabel_20_13" style:num-suffix="" text:bullet-char="">
        <style:list-level-properties text:list-level-position-and-space-mode="label-alignment">
          <style:list-level-label-alignment text:label-followed-by="listtab" text:list-tab-stop-position="6.583cm" fo:text-indent="-0.635cm" fo:margin-left="6.583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7.218cm" fo:text-indent="-0.635cm" fo:margin-left="7.218cm"/>
        </style:list-level-properties>
        <style:text-properties style:font-name="OpenSymbol1"/>
      </text:list-level-style-bullet>
      <text:list-level-style-bullet text:level="9" text:style-name="ListLabel_20_15" style:num-suffix="▪" text:bullet-char="▪">
        <style:list-level-properties text:list-level-position-and-space-mode="label-alignment">
          <style:list-level-label-alignment text:label-followed-by="listtab" text:list-tab-stop-position="7.853cm" fo:text-indent="-0.635cm" fo:margin-left="7.85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1-01T11:45:00</meta:creation-date>
    <meta:print-date>2013-08-19T09:35:05.100000000</meta:print-date>
    <dc:date>2018-10-25T17:01:52.076000000</dc:date>
    <meta:editing-cycles>11</meta:editing-cycles>
    <meta:editing-duration>P1DT2H54M46S</meta:editing-duration>
    <meta:generator>LibreOffice/6.0.4.2$Windows_X86_64 LibreOffice_project/9b0d9b32d5dcda91d2f1a96dc04c645c450872bf</meta:generator>
    <meta:document-statistic meta:table-count="0" meta:image-count="0" meta:object-count="0" meta:page-count="4" meta:paragraph-count="71" meta:word-count="1050" meta:character-count="7646" meta:non-whitespace-character-count="6584"/>
    <meta:template xlink:type="simple" xlink:actuate="onRequest" xlink:title="Normal" xlink:href=""/>
  </office:meta>
</office:document-meta>
</file>