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rmal arial" svg:font-family="'normal arial', sans-serif"/>
    <style:font-face style:name="Arial2" svg:font-family="Arial" style:font-family-generic="swiss"/>
    <style:font-face style:name="Calibri1" svg:font-family="Calibri" style:font-pitch="variable"/>
    <style:font-face style:name="Consolas1" svg:font-family="Consolas" style:font-pitch="variable"/>
    <style:font-face style:name="Mangal"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style:font-pitch="variable"/>
    <style:font-face style:name="Symbol1" svg:font-family="Symbol"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 style:family="paragraph" style:parent-style-name="Standa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3" style:family="paragraph" style:parent-style-name="Standa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4" style:family="paragraph" style:parent-style-name="Standa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5" style:family="paragraph" style:parent-style-name="Standa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6" style:family="paragraph" style:parent-style-name="Standa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7" style:family="paragraph" style:parent-style-name="Standa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8" style:family="paragraph" style:parent-style-name="Standa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9" style:family="paragraph" style:parent-style-name="Standaard" style:master-page-name="Standard">
      <style:paragraph-properties fo:margin-top="0cm" fo:margin-bottom="0cm" loext:contextual-spacing="false" fo:line-height="150%" fo:text-align="center" style:justify-single-word="false" style:page-number="auto"/>
      <style:text-properties style:font-name="Times New Roman" fo:font-size="14pt" fo:font-weight="bold" style:font-name-asian="Times New Roman" style:font-size-asian="14pt" style:language-asian="de" style:country-asian="DE" style:font-weight-asian="bold" style:font-name-complex="Times New Roman" style:font-size-complex="14pt"/>
    </style:style>
    <style:style style:name="P10" style:family="paragraph" style:parent-style-name="Standa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1" style:family="paragraph" style:parent-style-name="Standa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2" style:family="paragraph" style:parent-style-name="Standa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3" style:family="paragraph" style:parent-style-name="Standa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4" style:family="paragraph" style:parent-style-name="Standa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officeooo:paragraph-rsid="000f359f" style:font-name-asian="Times New Roman" style:font-size-asian="10pt" style:language-asian="de" style:country-asian="DE" style:font-name-complex="Times New Roman" style:font-size-complex="10pt"/>
    </style:style>
    <style:style style:name="P15" style:family="paragraph" style:parent-style-name="Standa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officeooo:paragraph-rsid="000f359f" style:font-name-asian="Times New Roman" style:font-size-asian="10pt" style:language-asian="de" style:country-asian="DE" style:font-name-complex="Times New Roman" style:font-size-complex="10pt"/>
    </style:style>
    <style:style style:name="P16"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7"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8"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9"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0"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1"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22"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23"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24" style:family="paragraph" style:parent-style-name="Standa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25" style:family="paragraph" style:parent-style-name="Standa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6" style:family="paragraph" style:parent-style-name="Standaard">
      <style:paragraph-properties fo:margin-left="1.251cm" fo:margin-right="0cm" fo:margin-top="0cm" fo:margin-bottom="0cm" loext:contextual-spacing="false" style:line-height-at-least="0.176cm" fo:text-indent="0cm" style:auto-text-indent="false"/>
    </style:style>
    <style:style style:name="P27" style:family="paragraph" style:parent-style-name="Standaard">
      <style:paragraph-properties fo:margin-left="1.251cm" fo:margin-right="0cm" fo:margin-top="0cm" fo:margin-bottom="0cm" loext:contextual-spacing="false" style:line-height-at-least="0.176cm" fo:text-align="justify" style:justify-single-word="false" fo:text-indent="0cm" style:auto-text-indent="false">
        <style:tab-stops>
          <style:tab-stop style:position="6.50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8" style:family="paragraph" style:parent-style-name="Standa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29" style:family="paragraph" style:parent-style-name="Standa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30" style:family="paragraph" style:parent-style-name="Standa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31" style:family="paragraph" style:parent-style-name="Standa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2" style:family="paragraph" style:parent-style-name="Standa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3" style:family="paragraph" style:parent-style-name="Standa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style>
    <style:style style:name="P34" style:family="paragraph" style:parent-style-name="Standa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35" style:family="paragraph" style:parent-style-name="Standaard">
      <style:paragraph-properties fo:margin-left="0cm" fo:margin-right="0cm" fo:margin-top="0cm" fo:margin-bottom="0cm" loext:contextual-spacing="false" fo:line-height="150%" fo:text-align="start" style:justify-single-word="false" fo:text-indent="0cm" style:auto-text-indent="false">
        <style:tab-stops>
          <style:tab-stop style:position="1.503cm"/>
          <style:tab-stop style:position="2.252cm"/>
          <style:tab-stop style:position="4.253cm"/>
        </style:tab-stops>
      </style:paragraph-properties>
    </style:style>
    <style:style style:name="P36" style:family="paragraph" style:parent-style-name="Standa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style>
    <style:style style:name="P37" style:family="paragraph" style:parent-style-name="Standa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2.004cm"/>
          <style:tab-stop style:position="2.503cm"/>
          <style:tab-stop style:position="4.754cm"/>
        </style:tab-stops>
      </style:paragraph-properties>
    </style:style>
    <style:style style:name="P38" style:family="paragraph" style:parent-style-name="Standa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9" style:family="paragraph" style:parent-style-name="Standaard" style:list-style-name="WW8Num3">
      <style:paragraph-properties fo:margin-left="2.773cm" fo:margin-right="0cm" fo:margin-top="0cm" fo:margin-bottom="0cm" loext:contextual-spacing="false"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0" style:family="paragraph" style:parent-style-name="Standa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41" style:family="paragraph" style:parent-style-name="Standaard">
      <style:paragraph-properties fo:margin-left="0.751cm" fo:margin-right="0cm" fo:margin-top="0cm" fo:margin-bottom="0cm" loext:contextual-spacing="false" style:line-height-at-least="0.176cm" fo:text-align="justify" style:justify-single-word="false" fo:text-indent="-0.751cm" style:auto-text-indent="false"/>
    </style:style>
    <style:style style:name="P42" style:family="paragraph" style:parent-style-name="Standa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3" style:family="paragraph" style:parent-style-name="Standaard" style:list-style-name="WW8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4" style:family="paragraph" style:parent-style-name="Tekstblok">
      <style:paragraph-properties>
        <style:tab-stops>
          <style:tab-stop style:position="0cm"/>
          <style:tab-stop style:position="1.251cm"/>
          <style:tab-stop style:position="3.251cm"/>
        </style:tab-stops>
      </style:paragraph-properties>
      <style:text-properties style:font-name="Times New Roman" fo:font-size="10pt" style:font-size-asian="10pt" style:font-name-complex="Times New Roman"/>
    </style:style>
    <style:style style:name="P45" style:family="paragraph" style:parent-style-name="Tekstblok">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46" style:family="paragraph" style:parent-style-name="Tekstblok">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font-name-complex="Times New Roman"/>
    </style:style>
    <style:style style:name="P47" style:family="paragraph" style:parent-style-name="Tekstblok">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48" style:family="paragraph" style:parent-style-name="Tekstblok">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font-name-complex="Times New Roman"/>
    </style:style>
    <style:style style:name="P49" style:family="paragraph" style:parent-style-name="List_20_Paragraph" style:list-style-name="WW8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50" style:family="paragraph" style:parent-style-name="List_20_Paragraph" style:list-style-name="WW8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T1" style:family="text">
      <style:text-properties style:font-name="Times New Roman" fo:font-size="10pt" style:font-name-asian="Times New Roman" style:font-size-asian="10pt" style:language-asian="de" style:country-asian="DE" style:font-name-complex="Times New Roman" style:font-size-complex="10pt"/>
    </style:style>
    <style:style style:name="T2" style:family="text">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T3" style:family="text">
      <style:text-properties style:font-name="Times New Roman" style:font-name-asian="Times New Roman" style:language-asian="de" style:country-asian="DE" style:font-name-complex="Times New Roman"/>
    </style:style>
    <style:style style:name="T4" style:family="text">
      <style:text-properties officeooo:rsid="000f35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ohnungs-Mietvertrag <text:s text:c="3"/></text:p>
      <text:p text:style-name="P10">DieVermieter<text:tab/>Herbrand und Oksana Hofker<text:tab/><text:tab/><text:tab/></text:p>
      <text:p text:style-name="P1">wohnhaft in<text:tab/>Kleve, Hauptstrasse25</text:p>
      <text:p text:style-name="P11">und der (die Mieter)<text:tab/><text:span text:style-name="T4">Malte Koch</text:span> und <text:span text:style-name="T4">Julia Miersch</text:span></text:p>
      <text:p text:style-name="P11"><text:tab/></text:p>
      <text:p text:style-name="P1">schließen folgenden Mietvertrag:</text:p>
      <text:p text:style-name="P6"/>
      <text:p text:style-name="P3">§ 1 Mieträume</text:p>
      <text:p text:style-name="P6"/>
      <text:p text:style-name="P12">1. <text:tab/>Im Hause</text:p>
      <text:p text:style-name="P12"><text:tab/>KLEVE, Hauptstrasse 25 , OG</text:p>
      <text:p text:style-name="P12"><text:tab/>werden folgende Räume vermietet:</text:p>
      <text:p text:style-name="P12"><text:tab/>3 Zimmer, 1Küche, 1 Badezimmer mit Bad/WC, <text:s/>1 Kellerräume , 1 Balkon</text:p>
      <text:p text:style-name="P12">2.<text:tab/>Dem Mieter werden vom Vermieter für die Mietzeit ausgehändigt:</text:p>
      <text:p text:style-name="P12"><text:tab/> 2 Haus-Schlüssel., 2 Wohnungs-,Schlüssel, 2 Keller-Schlüssel.</text:p>
      <text:p text:style-name="P12">3. <text:s/>Die Wohnfläche beträgt <text:s/>83,7 qm.</text:p>
      <text:p text:style-name="P12">4. <text:s/>Die Wohnung ist eine Eigentumswohnung. <text:s/></text:p>
      <text:p text:style-name="P7"/>
      <text:p text:style-name="P7"/>
      <text:p text:style-name="P4">§ 2 Mietzeit</text:p>
      <text:p text:style-name="P7"/>
      <text:p text:style-name="P25">Das Mietverhältnis beginnt am: 1 Oktober 201<text:span text:style-name="T4">7</text:span>, es läuft auf unbestimmte Zeit.</text:p>
      <text:p text:style-name="P7"/>
      <text:p text:style-name="P4">§ 3 Miete</text:p>
      <text:p text:style-name="P7"/>
      <text:p text:style-name="P12">1.<text:tab/>Die Miete beträgt monatlich: <text:span text:style-name="T4">575</text:span> Euro.</text:p>
      <text:p text:style-name="P14"><text:tab/>in Worten: <text:span text:style-name="T4">fünf</text:span>hundert <text:span text:style-name="T4">fünf <text:s/>und siebzig Euro</text:span>.</text:p>
      <text:p text:style-name="P16"><text:tab/>Mieterhöhungen und alle anderen Erklärungen, die Vertragsänderungen betreffen, muss der Vermieter schriftlich abgeben. Soweit gesetzlich zulässig, reicht die Abgabe der Erklärung in Textform aus.</text:p>
      <text:p text:style-name="P21"/>
      <text:p text:style-name="P21"/>
      <text:p text:style-name="P17">2.<text:tab/>Zusätzlich zur Miete bezahlt der Mieter</text:p>
      <text:p text:style-name="P17"><text:tab/></text:p>
      <text:p text:style-name="P13"><text:tab/>für Heizung und Warmwasser,Wasserversorgung, Entwässerung, Müllabfuhr, Grundsteuer, Gartenpflege, <text:s/>Hausmeister, Straßenreinigung, Allgemeinstrom <text:s text:c="2"/>eine Vorauszahlung in Höhe von <text:s/>1<text:span text:style-name="T4">2</text:span>0 Euro monatlich.</text:p>
      <text:p text:style-name="P18"><text:tab/>Über die Vorauszahlungen wird jährlich abgerechnet.</text:p>
      <text:p text:style-name="P22"/>
      <text:p text:style-name="P15">3.<text:tab/>Der Gesamtbetrag der Miete in Höhe von monatlich <text:span text:style-name="T4">695</text:span> Euro ist auf das Konto <text:span text:style-name="T4">DE47324700240090215500 </text:span><text:s/>bei die Deutsche Bank Kleve des Vermieters zu zahlen.</text:p>
      <text:p text:style-name="P28"/>
      <text:p text:style-name="P28"/>
      <text:p text:style-name="P31">§ 4 Verteilung und Abrechnung der Heiz- und Betriebskosten</text:p>
      <text:p text:style-name="P28"/>
      <text:p text:style-name="P19">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p>
      <text:p text:style-name="P23"><text:soft-page-break/></text:p>
      <text:p text:style-name="P19">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23"/>
      <text:p text:style-name="P19">3.<text:tab/>Andere Betriebskosten werden verbrauchsabhängig oder verursachungsabhängig abgerechnet, soweit sie entsprechend erfasst werden. Anderenfalls erfolgt die Abrechnung über</text:p>
      <text:p text:style-name="P37"/>
      <text:list xml:id="list8867426475119520424" text:style-name="WW8Num3">
        <text:list-item>
          <text:p text:style-name="P39">die Betriebskosten nach dem Anteil der Wohnfläche;<text:tab/></text:p>
        </text:list-item>
        <text:list-item>
          <text:p text:style-name="P39">die Betriebskosten für Wasserversorgung, Entwässerung und Müllabfuhr nach Personenzahl. </text:p>
        </text:list-item>
      </text:list>
      <text:p text:style-name="P34"><text:s text:c="9"/></text:p>
      <text:p text:style-name="P33"><text:span text:style-name="T1"><text:s text:c="8"/>4. <text:s/>Über die Heiz- und Betriebskosten wird einmal jährlich innerhalb angemessener Frist abgerechnet.</text:span></text:p>
      <text:p text:style-name="P35"><text:span text:style-name="T1"><text:s text:c="13"/>Der Abrechnungszeitraum endet jeweils zum 31 Dezember.</text:span></text:p>
      <text:p text:style-name="P24"/>
      <text:p text:style-name="P27">Über- oder unterschreiten die Vorauszahlungen die tatsächlichen Kosten, so kann jede Vertragspartei die Vorauszahlung auf einen angemessenen Betrag anpassen.</text:p>
      <text:p text:style-name="P8"/>
      <text:p text:style-name="P8"/>
      <text:p text:style-name="P32">§ 5 Mängel und Schäden an der Wohnung</text:p>
      <text:p text:style-name="P29"/>
      <text:p text:style-name="P20">1.<text:tab/>Zeigt sich in der Wohnung ein Mangel, so muss dies der Mieter dem Vermieter unverzüglich mitteilen.</text:p>
      <text:p text:style-name="P40"/>
      <text:p text:style-name="P20">2.<text:tab/>Der Mieter haftet dem Vermieter für Schäden, die er selbst, seine Mitbewohner, Hausgehilfen, Untermieter sowie von ihm beauftragte Handwerker nach dem Einzug schuldhaft verursacht haben.</text:p>
      <text:p text:style-name="P24"/>
      <text:p text:style-name="P29"/>
      <text:p text:style-name="P41"><text:span text:style-name="T2">§ 6 <text:tab/></text:span><text:bookmark-start text:name="_GoBack"/><text:span text:style-name="T2">Schönheitsreparaturen</text:span></text:p>
      <text:p text:style-name="P42"/>
      <text:list xml:id="list4948339198546434468" text:style-name="WW8Num2">
        <text:list-item>
          <text:p text:style-name="P49"><text:span text:style-name="T1">Die Schönheitsreparaturen übernimmt der Mieter. Hierzu gehören das </text:span><text:span text:style-name="T3">Tapezieren, Streichen, Kalken der Wände und Decken, das </text:span><text:span text:style-name="T1">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50">Die Schönheitsreparaturen sind durchzuführen, wenn die Abnutzung es erfordert, im Allgemeinen in den Nassräumen alle drei Jahre, sonst alle fünf Jahre.</text:p>
        </text:list-item>
      </text:list>
      <text:p text:style-name="P29"><text:bookmark-end text:name="_GoBack"/></text:p>
      <text:p text:style-name="P32">§ 7 Ausbesserungen und bauliche Veränderungen</text:p>
      <text:p text:style-name="P29"/>
      <text:list xml:id="list8185374666634480497" text:style-name="WW8Num1">
        <text:list-item>
          <text:p text:style-name="P43">Der Mieter hat Maßnahmen in der Wohnung oder im Haus zu dulden, die erforderlich sind, um sie oder das Gebäude zu erhalten (Instandsetzungs- und Instandhaltungsmaßnahmen).</text:p>
        </text:list-item>
      </text:list>
      <text:p text:style-name="P30"/>
      <text:list xml:id="list153234819810229" text:continue-numbering="true" text:style-name="WW8Num1">
        <text:list-item>
          <text:p text:style-name="P43">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0"/>
      <text:p text:style-name="P29"/>
      <text:p text:style-name="P46">§ 8 Nutzung der Mieträume, Untervermietung</text:p>
      <text:p text:style-name="P45"/>
      <text:p text:style-name="P48">1.<text:tab/>Der Mieter kann jederzeit Ehegatten, Familienangehörige oder Lebenspartner, die mit dem Mieter einen auf Dauer angelegten gemeinsamen Haushalt führen wollen, in die Wohnung aufnehmen, wenn diese dadurch nicht überbelegt wird. </text:p>
      <text:p text:style-name="P47"/>
      <text:p text:style-name="P48">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p>
      <text:p text:style-name="P47"><text:soft-page-break/></text:p>
      <text:p text:style-name="P48">3.<text:tab/>Eine Berufsausübung in der Wohnung ist dann genehmigungspflichtig, wenn hierdurch erhebliche Interessen der Nachbarn oder des Vermieters berührt werden. Telearbeit und nicht störende Betätigungen sind ohne Genehmigung zulässig.</text:p>
      <text:p text:style-name="P47"/>
      <text:p text:style-name="P45"/>
      <text:p text:style-name="P38"><text:tab/>§ 9 Tierhaltung</text:p>
      <text:p text:style-name="P24"/>
      <text:p text:style-name="P20">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24"/>
      <text:p text:style-name="P20">2.<text:tab/>Der Vermieter kann der Tierhaltung widersprechen, wenn durch die Tierhaltung die Hausgemeinschaft belästigt wird.</text:p>
      <text:p text:style-name="P29"/>
      <text:p text:style-name="P29"/>
      <text:p text:style-name="P32">§ 10 Gartennutzung</text:p>
      <text:p text:style-name="P29"/>
      <text:p text:style-name="P20">1.<text:tab/>Der Mieter darf den zum Haus gehörenden Garten nutzen.</text:p>
      <text:p text:style-name="P24"/>
      <text:p text:style-name="P20">2.<text:tab/>Die Pflege des Gartens übernimmt der <text:s/>Vermieter.</text:p>
      <text:p text:style-name="P29"/>
      <text:p text:style-name="P29"/>
      <text:p text:style-name="P32">§ 11 Fernseh- und Rundfunkempfang</text:p>
      <text:p text:style-name="P29"/>
      <text:p text:style-name="P20">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29"/>
      <text:p text:style-name="P29"/>
      <text:p text:style-name="P5">§ 12 Betreten der Mieträume durch den Vermieter</text:p>
      <text:p text:style-name="P29"/>
      <text:p text:style-name="P20">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24"/>
      <text:p text:style-name="P20">2.<text:tab/>Damit der Vermieter im Notfall auch bei längerer Abwesenheit des Mieters Zugang zur Wohnung hat, muss dieser dem Vermieter mitteilen, wem er zu diesem Zweck einen Wohnungsschlüssel überlassen hat.</text:p>
      <text:p text:style-name="P45"/>
      <text:p text:style-name="P46">§ 13 Auszug des Mieters</text:p>
      <text:p text:style-name="P45"/>
      <text:p text:style-name="P44">Zieht der Mieter aus, muss er die Räume besenrein und mit sämtlichen Schlüsseln dem Vermieter oder seinem Verwalter zurückgeben.</text:p>
      <text:p text:style-name="P45"/>
      <text:p text:style-name="P32">§ 21 Mehrere Mieter</text:p>
      <text:p text:style-name="P29"/>
      <text:p text:style-name="P20">1.<text:tab/>Mehrere Mieter haften für alle Verpflichtungen aus dem Mietverhältnis als Gesamtschuldner.</text:p>
      <text:p text:style-name="P24"/>
      <text:p text:style-name="P20">2.<text:tab/>Kündigungen, Mieterhöhungen sowie andere Erklärungen mit dem Ziel, eine Vertragsänderung herbei zu führen, müssen von oder gegenüber allen Mietern abgegeben werden.</text:p>
      <text:p text:style-name="P24"/>
      <text:p text:style-name="P32">§ 22 Sonstige Vereinbarungen</text:p>
      <text:p text:style-name="P29"/>
      <text:p text:style-name="P20">1.<text:tab/>Die Hausordnung ist Bestandteil dieses Vertrages, wenn sie ihm beigefügt ist. Wesentliche Verpflichtungen des Mietvertrages können hierdurch nicht abgeändert oder ergänzt werden.</text:p>
      <text:p text:style-name="P26"/>
      <text:p text:style-name="P20"><text:soft-page-break/>2. Mieter und Vermieter vereinbaren als Sicherheit eine Mietkaution in Höhe von <text:span text:style-name="T4">1000 </text:span><text:s/>Euro, zu bezahlen bei Anfang von die Miete.</text:p>
      <text:p text:style-name="P24"/>
      <text:p text:style-name="P36"><text:span text:style-name="T1"><text:s text:c="4"/></text:span></text:p>
      <text:p text:style-name="P8"/>
      <text:p text:style-name="P2"><text:tab/>Kleve Montag, den <text:span text:style-name="T4">2</text:span> <text:span text:style-name="T4">September </text:span><text:s/>201<text:span text:style-name="T4">7</text:span></text:p>
      <text:p text:style-name="P8"/>
      <text:p text:style-name="P8"/>
      <text:p text:style-name="P8"><text:tab/>Vermieter:<text:tab/><text:tab/><text:tab/><text:tab/>Mieter </text:p>
      <text:p text:style-name="P2"><text:tab/>Herbrand <text:span text:style-name="T4">und Oksana </text:span>Hofker<text:tab/><text:tab/><text:tab/><text:tab/><text:span text:style-name="T4">Malte Koch und Julia Miers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rmal arial" svg:font-family="'normal arial', sans-serif"/>
    <style:font-face style:name="Arial2" svg:font-family="Arial" style:font-family-generic="swiss"/>
    <style:font-face style:name="Calibri1" svg:font-family="Calibri" style:font-pitch="variable"/>
    <style:font-face style:name="Consolas1" svg:font-family="Consolas" style:font-pitch="variable"/>
    <style:font-face style:name="Mangal"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style:font-pitch="variable"/>
    <style:font-face style:name="Symbol1" svg:font-family="Symbol"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nl" fo:country="NL" style:letter-kerning="true" style:font-name-asian="SimSun1"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ard" style:class="index">
      <style:paragraph-properties text:number-lines="false" text:line-number="0"/>
      <style:text-properties style:font-name-complex="Mangal" style:font-family-complex="Mangal" style:font-pitch-complex="variable"/>
    </style:style>
    <style:style style:name="Standaard" style:family="paragraph">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de" fo:country="DE" style:letter-kerning="true" style:font-name-asian="SimSun1" style:font-family-asian="SimSun" style:font-pitch-asian="variable" style:font-size-asian="11pt" style:language-asian="en" style:country-asian="US" style:font-name-complex="Calibri1" style:font-family-complex="Calibri" style:font-pitch-complex="variable" style:font-size-complex="11pt" style:language-complex="ar" style:country-complex="SA" fo:hyphenate="false" fo:hyphenation-remain-char-count="2" fo:hyphenation-push-char-count="2"/>
    </style:style>
    <style:style style:name="Kop" style:family="paragraph" style:parent-style-name="Standaard">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kstblok" style:family="paragraph" style:parent-style-name="Standa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style:style>
    <style:style style:name="Lijst" style:family="paragraph" style:parent-style-name="Tekstblok">
      <style:text-properties style:font-name-complex="Mangal" style:font-family-complex="Mangal" style:font-pitch-complex="variable"/>
    </style:style>
    <style:style style:name="Bijschrift" style:family="paragraph" style:parent-style-name="Standa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List_20_Paragraph" style:display-name="List Paragraph" style:family="paragraph" style:parent-style-name="Standaard">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ard">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pitch-complex="variable" style:font-size-complex="10pt"/>
    </style:style>
    <style:style style:name="Koptekst" style:family="paragraph" style:parent-style-name="Standaard">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Voettekst" style:family="paragraph" style:parent-style-name="Standaard">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1" style:font-family-complex="Symbol"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Opsommingstekens" style:family="text">
      <style:text-properties style:font-name="OpenSymbol1" fo:font-family="OpenSymbol, 'Arial Unicode MS'" style:font-family-generic="roman" style:font-pitch="variable" style:font-name-asian="OpenSymbol" style:font-family-asian="OpenSymbol, 'Arial Unicode MS'" style:font-pitch-asian="variable" style:font-name-complex="OpenSymbol" style:font-family-complex="OpenSymbol, 'Arial Unicode MS'" style:font-pitch-complex="variable"/>
    </style:style>
    <style:style style:name="ListLabel_20_1" style:display-name="ListLabel 1" style:family="text">
      <style:text-properties style:font-name-complex="Symbol1" style:font-family-complex="Symbol"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Symbol1" style:font-family-complex="Symbol"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Symbol1" style:font-family-complex="Symbol"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Symbol1" style:font-family-complex="Symbol"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Symbol1" style:font-family-complex="Symbol"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Symbol1" style:font-family-complex="Symbol"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ext:p text:style-name="Koptekst"/>
      </style:header>
      <style:footer>
        <text:p text:style-name="Voettek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dc:date>2017-09-02T15:32:33.439000000</dc:date>
    <meta:print-date>2013-08-19T09:35:00</meta:print-date>
    <meta:editing-cycles>2</meta:editing-cycles>
    <meta:editing-duration>PT11M48S</meta:editing-duration>
    <meta:document-statistic meta:table-count="0" meta:image-count="0" meta:object-count="0" meta:page-count="4" meta:paragraph-count="72" meta:word-count="1033" meta:character-count="7510" meta:non-whitespace-character-count="6464"/>
    <meta:generator>LibreOffice/5.2.7.2$Windows_x86 LibreOffice_project/2b7f1e640c46ceb28adf43ee075a6e8b8439ed10</meta:generator>
  </office:meta>
</office:document-meta>
</file>