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6"/>
  </office:automatic-styles>
  <office:body>
    <office:spreadsheet>
      <table:table table:name="Blad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/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excl</text:p>
          </table:table-cell>
          <table:table-cell table:style-name="Default" office:value-type="string" calcext:value-type="string">
            <text:p>ink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currency" office:currency="EUR" office:value="63.22" calcext:value-type="currency">
            <text:p>63,22 €</text:p>
          </table:table-cell>
          <table:table-cell table:formula="of:=1.19*[.C2]" office:value-type="currency" office:currency="EUR" office:value="75.2318" calcext:value-type="currency">
            <text:p>75,23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-11-2013</text:p>
          </table:table-cell>
          <table:table-cell office:value-type="currency" office:currency="EUR" office:value="37.78" calcext:value-type="currency">
            <text:p>37,78 €</text:p>
          </table:table-cell>
          <table:table-cell table:formula="of:=1.19*[.C3]" office:value-type="currency" office:currency="EUR" office:value="44.9582" calcext:value-type="currency">
            <text:p>44,96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5-11-2013</text:p>
          </table:table-cell>
          <table:table-cell office:value-type="currency" office:currency="EUR" office:value="4.7" calcext:value-type="currency">
            <text:p>4,70 €</text:p>
          </table:table-cell>
          <table:table-cell table:formula="of:=1.19*[.C4]" office:value-type="currency" office:currency="EUR" office:value="5.593" calcext:value-type="currency">
            <text:p>5,59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-11-2013</text:p>
          </table:table-cell>
          <table:table-cell office:value-type="currency" office:currency="EUR" office:value="18.47" calcext:value-type="currency">
            <text:p>18,47 €</text:p>
          </table:table-cell>
          <table:table-cell table:formula="of:=1.19*[.C5]" office:value-type="currency" office:currency="EUR" office:value="21.9793" calcext:value-type="currency">
            <text:p>21,98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8-12-2013</text:p>
          </table:table-cell>
          <table:table-cell office:value-type="currency" office:currency="EUR" office:value="33.57" calcext:value-type="currency">
            <text:p>33,57 €</text:p>
          </table:table-cell>
          <table:table-cell table:formula="of:=1.19*[.C6]" office:value-type="currency" office:currency="EUR" office:value="39.9483" calcext:value-type="currency">
            <text:p>39,95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3-12-2013</text:p>
          </table:table-cell>
          <table:table-cell office:value-type="currency" office:currency="EUR" office:value="68.82" calcext:value-type="currency">
            <text:p>68,82 €</text:p>
          </table:table-cell>
          <table:table-cell table:formula="of:=1.19*[.C7]" office:value-type="currency" office:currency="EUR" office:value="81.8958" calcext:value-type="currency">
            <text:p>81,90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3-11-2013</text:p>
          </table:table-cell>
          <table:table-cell office:value-type="currency" office:currency="EUR" office:value="26.45" calcext:value-type="currency">
            <text:p>26,45 €</text:p>
          </table:table-cell>
          <table:table-cell table:formula="of:=1.19*[.C8]" office:value-type="currency" office:currency="EUR" office:value="31.4755" calcext:value-type="currency">
            <text:p>31,48 €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-11-2013</text:p>
          </table:table-cell>
          <table:table-cell office:value-type="currency" office:currency="EUR" office:value="15.11" calcext:value-type="currency">
            <text:p>15,11 €</text:p>
          </table:table-cell>
          <table:table-cell table:formula="of:=1.19*[.C9]" office:value-type="currency" office:currency="EUR" office:value="17.9809" calcext:value-type="currency">
            <text:p>17,98 €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-11-2013</text:p>
          </table:table-cell>
          <table:table-cell table:formula="of:=100/119*[.D10]" office:value-type="currency" office:currency="EUR" office:value="88.1596638655462" calcext:value-type="currency">
            <text:p>88,16 €</text:p>
          </table:table-cell>
          <table:table-cell office:value-type="currency" office:currency="EUR" office:value="104.91" calcext:value-type="currency">
            <text:p>104,91 €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3-11-2013</text:p>
          </table:table-cell>
          <table:table-cell office:value-type="currency" office:currency="EUR" office:value="9.24" calcext:value-type="currency">
            <text:p>9,24 €</text:p>
          </table:table-cell>
          <table:table-cell table:formula="of:=1.19*[.C11]" office:value-type="currency" office:currency="EUR" office:value="10.9956" calcext:value-type="currency">
            <text:p>11,00 €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5-01-2014</text:p>
          </table:table-cell>
          <table:table-cell office:value-type="currency" office:currency="EUR" office:value="36.92" calcext:value-type="currency">
            <text:p>36,92 €</text:p>
          </table:table-cell>
          <table:table-cell table:formula="of:=1.19*[.C12]" office:value-type="currency" office:currency="EUR" office:value="43.9348" calcext:value-type="currency">
            <text:p>43,93 €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9-11-2013</text:p>
          </table:table-cell>
          <table:table-cell office:value-type="currency" office:currency="EUR" office:value="25.17" calcext:value-type="currency">
            <text:p>25,17 €</text:p>
          </table:table-cell>
          <table:table-cell table:formula="of:=1.19*[.C13]" office:value-type="currency" office:currency="EUR" office:value="29.9523" calcext:value-type="currency">
            <text:p>29,95 €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formula="of:=SUM([.C2:.C14])" office:value-type="currency" office:currency="EUR" office:value="427.609663865546" calcext:value-type="currency">
            <text:p>427,61 €</text:p>
          </table:table-cell>
          <table:table-cell table:style-name="Default" table:formula="of:=SUM([.D2:.D14])" office:value-type="float" office:value="508.8555" calcext:value-type="float">
            <text:p>508,855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.00.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2:42:50.250000000</meta:creation-date>
    <dc:date>2015-12-13T12:59:52.588000000</dc:date>
    <meta:editing-duration>PT1M49S</meta:editing-duration>
    <meta:editing-cycles>1</meta:editing-cycles>
    <meta:document-statistic meta:table-count="1" meta:cell-count="52" meta:object-count="0"/>
    <meta:generator>LibreOffice/4.4.5.2$Windows_x86 LibreOffice_project/a22f674fd25a3b6f45bdebf25400ed2adff0ff99</meta:generator>
  </office:meta>
</office:document-meta>
</file>