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9cbc" officeooo:paragraph-rsid="000f9cbc"/>
    </style:style>
    <style:style style:name="P2" style:family="paragraph" style:parent-style-name="Standard">
      <style:text-properties officeooo:paragraph-rsid="000f9cbc"/>
    </style:style>
    <style:style style:name="T1" style:family="text">
      <style:text-properties officeooo:rsid="000f9cbc"/>
    </style:style>
    <style:style style:name="T2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0f9cbc" style:font-size-asian="12pt" style:font-style-asian="normal" style:font-weight-asian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Stadtwerke Kleve</text:p>
      <text:p text:style-name="P1">Flutstrasse 36</text:p>
      <text:p text:style-name="P1">47533 Kleve</text:p>
      <text:p text:style-name="P1"/>
      <text:p text:style-name="P1"/>
      <text:p text:style-name="P1"><text:tab/><text:tab/><text:tab/><text:tab/><text:tab/><text:tab/><text:tab/><text:tab/><text:tab/><text:tab/><text:tab/><text:tab/><text:tab/>Kleve, 17/8/2019</text:p>
      <text:p text:style-name="P1"/>
      <text:p text:style-name="P1">Sehr geehrte Herr/Frau,</text:p>
      <text:p text:style-name="P1"/>
      <text:p text:style-name="P1">Kundennummer : 184455-88932</text:p>
      <text:p text:style-name="P1">Rechnung : <text:s/>V0001-ARV-2019-5215</text:p>
      <text:p text:style-name="P1"/>
      <text:p text:style-name="P1"/>
      <text:p text:style-name="P2"><text:span text:style-name="T1">Bitte brauchen Sie </text:span><text:span text:style-name="T2">NL03KNAB0256824908 <text:s/></text:span><text:span text:style-name="T3">(Herbrand H.Hofker/Oksana Voznyuk)</text:span></text:p>
      <text:p text:style-name="P1"><text:span text:style-name="T2">als Bankverbindung.</text:span></text:p>
      <text:p text:style-name="P1"><text:span text:style-name="T2"/></text:p>
      <text:p text:style-name="P1"><text:span text:style-name="T2"/></text:p>
      <text:p text:style-name="P1"><text:span text:style-name="T2">Mfg</text:span></text:p>
      <text:p text:style-name="P1"><text:span text:style-name="T2">Herbrand Hofker</text:span></text:p>
      <text:p text:style-name="P1"><text:span text:style-name="T2">Oudaen 26</text:span></text:p>
      <text:p text:style-name="P1"><text:span text:style-name="T2">8219 AB Lelystad</text:span></text:p>
      <text:p text:style-name="P1"><text:span text:style-name="T2">Niederlande</text:span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6T18:33:55.541000000</meta:creation-date>
    <meta:print-date>2019-08-16T18:39:03.539000000</meta:print-date>
    <dc:date>2019-08-16T18:41:54.875000000</dc:date>
    <meta:editing-duration>PT8M</meta:editing-duration>
    <meta:editing-cycles>1</meta:editing-cycles>
    <meta:document-statistic meta:table-count="0" meta:image-count="0" meta:object-count="0" meta:page-count="1" meta:paragraph-count="14" meta:word-count="35" meta:character-count="297" meta:non-whitespace-character-count="261"/>
    <meta:generator>LibreOffice/6.1.4.2$Windows_X86_64 LibreOffice_project/9d0f32d1f0b509096fd65e0d4bec26ddd1938fd3</meta:generator>
  </office:meta>
</office:document-meta>
</file>